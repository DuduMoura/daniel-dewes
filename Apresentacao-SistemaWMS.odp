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linecap="butt" draw:fill="solid" draw:fill-color="#0f2a4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standard">
      <style:graphic-properties draw:stroke="none" svg:stroke-width="0.026cm" svg:stroke-linecap="butt" draw:fill="solid" draw:fill-color="#f59e0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>
      <style:graphic-properties draw:stroke="none" svg:stroke-width="0.026cm" svg:stroke-linecap="butt" draw:fill="solid" draw:fill-color="#14b8a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width="0.026cm" svg:stroke-linecap="butt" draw:fill="solid" draw:fill-color="#123a5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draw:stroke="none" svg:stroke-width="0.026cm" svg:stroke-linecap="butt" draw:fill="solid" draw:fill-color="#f1f5f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>
      <style:graphic-properties draw:stroke="none" svg:stroke-width="0.026cm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8" style:family="graphic" style:parent-style-name="standard" style:list-style-name="L6">
      <style:graphic-properties draw:stroke="none" svg:stroke-width="0.026cm" svg:stroke-linecap="butt" draw:fill="solid" draw:fill-color="#f59e0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svg:stroke-linecap="butt" draw:fill="solid" draw:fill-color="#14b8a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svg:stroke-linecap="butt" draw:fill="solid" draw:fill-color="#60a5f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width="0.026cm" svg:stroke-linecap="butt" draw:fill="solid" draw:fill-color="#a78bf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.026cm" svg:stroke-linecap="butt" draw:fill="solid" draw:fill-color="#f59e0b" draw:textarea-horizontal-align="justify" draw:textarea-vertical-align="middle" draw:auto-grow-height="false" draw:fit-to-size="false" style:shrink-to-fit="false" fo:min-height="0cm" fo:min-width="0cm" fo:padding-top="0.071cm" fo:padding-bottom="0.071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3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6">
      <style:graphic-properties draw:stroke="none" svg:stroke-width="0.026cm" svg:stroke-linecap="butt" draw:fill="solid" draw:fill-color="#f59e0b" draw:textarea-horizontal-align="justify" draw:textarea-vertical-align="middle" draw:auto-grow-height="false" draw:fit-to-size="false" style:shrink-to-fit="false" fo:min-height="0cm" fo:min-width="0cm" fo:padding-top="0.071cm" fo:padding-bottom="0.071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4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>
      <style:graphic-properties draw:stroke="none" svg:stroke-width="0.026cm" svg:stroke-linecap="butt" draw:fill="solid" draw:fill-color="#60a5f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5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6">
      <style:graphic-properties draw:stroke="none" svg:stroke-width="0.026cm" svg:stroke-linecap="butt" draw:fill="solid" draw:fill-color="#f59e0b" draw:textarea-horizontal-align="justify" draw:textarea-vertical-align="middle" draw:auto-grow-height="false" draw:fit-to-size="false" style:shrink-to-fit="false" fo:min-height="0cm" fo:min-width="0cm" fo:padding-top="0.071cm" fo:padding-bottom="0.071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width="0.026cm" svg:stroke-linecap="butt" draw:fill="solid" draw:fill-color="#14b8a6" draw:textarea-horizontal-align="justify" draw:textarea-vertical-align="middle" draw:auto-grow-height="false" draw:fit-to-size="false" style:shrink-to-fit="false" fo:min-height="0cm" fo:min-width="0cm" fo:padding-top="0.071cm" fo:padding-bottom="0.071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6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width="0.026cm" svg:stroke-linecap="butt" draw:fill="solid" draw:fill-color="#14b8a6" draw:textarea-horizontal-align="justify" draw:textarea-vertical-align="middle" draw:auto-grow-height="false" draw:fit-to-size="false" style:shrink-to-fit="false" fo:min-height="0cm" fo:min-width="0cm" fo:padding-top="0.071cm" fo:padding-bottom="0.071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77" style:family="graphic" style:parent-style-name="standard" style:list-style-name="L6">
      <style:graphic-properties draw:stroke="none" svg:stroke-width="0.026cm" svg:stroke-linecap="butt" draw:fill="solid" draw:fill-color="#f59e0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78" style:family="graphic" style:parent-style-name="standard" style:list-style-name="L6">
      <style:graphic-properties draw:stroke="none" svg:stroke-width="0.026cm" svg:stroke-linecap="butt" draw:fill="solid" draw:fill-color="#f59e0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7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6">
      <style:graphic-properties draw:stroke="none" svg:stroke-width="0.026cm" svg:stroke-linecap="butt" draw:fill="solid" draw:fill-color="#f59e0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8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6">
      <style:graphic-properties draw:stroke="none" svg:stroke-width="0.026cm" svg:stroke-linecap="butt" draw:fill="solid" draw:fill-color="#f59e0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8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4" style:family="graphic" style:parent-style-name="standard" style:list-style-name="L6">
      <style:graphic-properties draw:stroke="none" svg:stroke-width="0.026cm" svg:stroke-linecap="butt" draw:fill="solid" draw:fill-color="#f59e0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8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6">
      <style:graphic-properties draw:stroke="none" svg:stroke-width="0.026cm" svg:stroke-linecap="butt" draw:fill="solid" draw:fill-color="#f59e0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8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width="0.026cm" svg:stroke-linecap="butt" draw:fill="solid" draw:fill-color="#14b8a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width="0.026cm" svg:stroke-linecap="butt" draw:fill="solid" draw:fill-color="#14b8a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9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width="0.026cm" svg:stroke-linecap="butt" draw:fill="solid" draw:fill-color="#14b8a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9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width="0.026cm" svg:stroke-linecap="butt" draw:fill="solid" draw:fill-color="#14b8a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9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width="0.026cm" svg:stroke-linecap="butt" draw:fill="solid" draw:fill-color="#14b8a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9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width="0.026cm" svg:stroke-linecap="butt" draw:fill="solid" draw:fill-color="#14b8a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9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width="0.026cm" svg:stroke-linecap="butt" draw:fill="solid" draw:fill-color="#14b8a6" draw:textarea-horizontal-align="justify" draw:textarea-vertical-align="middle" draw:auto-grow-height="false" draw:fit-to-size="false" style:shrink-to-fit="false" fo:min-height="0cm" fo:min-width="0cm" fo:padding-top="0.071cm" fo:padding-bottom="0.071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0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standard">
      <style:graphic-properties draw:stroke="none" svg:stroke-width="0.026cm" svg:stroke-linecap="butt" draw:fill="solid" draw:fill-color="#a78bf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0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width="0.026cm" svg:stroke-linecap="butt" draw:fill="solid" draw:fill-color="#60a5fa" draw:textarea-horizontal-align="justify" draw:textarea-vertical-align="middle" draw:auto-grow-height="false" draw:fit-to-size="false" style:shrink-to-fit="false" fo:min-height="0cm" fo:min-width="0cm" fo:padding-top="0.071cm" fo:padding-bottom="0.071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width="0.026cm" svg:stroke-linecap="butt" draw:fill="solid" draw:fill-color="#60a5fa" draw:textarea-horizontal-align="justify" draw:textarea-vertical-align="middle" draw:auto-grow-height="false" draw:fit-to-size="false" style:shrink-to-fit="false" fo:min-height="0cm" fo:min-width="0cm" fo:padding-top="0.071cm" fo:padding-bottom="0.071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5" style:family="graphic" style:parent-style-name="standard">
      <style:graphic-properties draw:stroke="none" svg:stroke-width="0.026cm" svg:stroke-linecap="butt" draw:fill="solid" draw:fill-color="#cbd5e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width="0.026cm" svg:stroke-linecap="butt" draw:fill="solid" draw:fill-color="#60a5fa" draw:textarea-horizontal-align="justify" draw:textarea-vertical-align="middle" draw:auto-grow-height="false" draw:fit-to-size="false" style:shrink-to-fit="false" fo:min-height="0cm" fo:min-width="0cm" fo:padding-top="0.071cm" fo:padding-bottom="0.071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width="0.026cm" svg:stroke-linecap="butt" draw:fill="solid" draw:fill-color="#a78bfa" draw:textarea-horizontal-align="justify" draw:textarea-vertical-align="middle" draw:auto-grow-height="false" draw:fit-to-size="false" style:shrink-to-fit="false" fo:min-height="0cm" fo:min-width="0cm" fo:padding-top="0.071cm" fo:padding-bottom="0.071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width="0.026cm" svg:stroke-linecap="butt" draw:fill="solid" draw:fill-color="#a78bfa" draw:textarea-horizontal-align="justify" draw:textarea-vertical-align="middle" draw:auto-grow-height="false" draw:fit-to-size="false" style:shrink-to-fit="false" fo:min-height="0cm" fo:min-width="0cm" fo:padding-top="0.071cm" fo:padding-bottom="0.071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width="0.026cm" svg:stroke-linecap="butt" draw:fill="solid" draw:fill-color="#a78bfa" draw:textarea-horizontal-align="justify" draw:textarea-vertical-align="middle" draw:auto-grow-height="false" draw:fit-to-size="false" style:shrink-to-fit="false" fo:min-height="0cm" fo:min-width="0cm" fo:padding-top="0.071cm" fo:padding-bottom="0.071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6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svg:stroke-width="0.026cm" svg:stroke-linecap="butt" draw:fill="solid" draw:fill-color="#a78bfa" draw:textarea-horizontal-align="justify" draw:textarea-vertical-align="middle" draw:auto-grow-height="false" draw:fit-to-size="false" style:shrink-to-fit="false" fo:min-height="0cm" fo:min-width="0cm" fo:padding-top="0.071cm" fo:padding-bottom="0.071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86" style:family="graphic" style:parent-style-name="standard" style:list-style-name="L6">
      <style:graphic-properties draw:stroke="none" svg:stroke-width="0.026cm" svg:stroke-linecap="butt" draw:fill="solid" draw:fill-color="#f59e0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9" style:family="graphic" style:parent-style-name="standard" style:list-style-name="L6">
      <style:graphic-properties draw:stroke="none" svg:stroke-width="0.026cm" svg:stroke-linecap="butt" draw:fill="solid" draw:fill-color="#f59e0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9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2" style:family="graphic" style:parent-style-name="standard" style:list-style-name="L6">
      <style:graphic-properties draw:stroke="none" svg:stroke-width="0.026cm" svg:stroke-linecap="butt" draw:fill="solid" draw:fill-color="#f59e0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9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5" style:family="graphic" style:parent-style-name="standard" style:list-style-name="L6">
      <style:graphic-properties draw:stroke="none" svg:stroke-width="0.026cm" svg:stroke-linecap="butt" draw:fill="solid" draw:fill-color="#f59e0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9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8" style:family="graphic" style:parent-style-name="standard" style:list-style-name="L6">
      <style:graphic-properties draw:stroke="none" svg:stroke-width="0.026cm" svg:stroke-linecap="butt" draw:fill="solid" draw:fill-color="#f59e0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9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0f2a43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solid" draw:fill-color="#f59e0b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" style:family="paragraph">
      <style:paragraph-properties fo:margin-left="0cm" fo:margin-right="0cm" fo:margin-top="0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.353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="solid" draw:fill-color="#14b8a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loext:graphic-properties draw:fill="solid" draw:fill-color="#123a5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0" style:family="paragraph">
      <style:paragraph-properties fo:margin-left="0cm" fo:margin-right="0cm" fo:margin-top="0cm" fo:margin-bottom="0.071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.071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f1f5f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4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loext:graphic-properties draw:fill="solid" draw:fill-color="#f59e0b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6" style:family="paragraph">
      <style:paragraph-properties fo:margin-left="0cm" fo:margin-right="0cm" fo:margin-top="0cm" fo:margin-bottom="0.071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.071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.212cm" fo:line-height="100%" fo:text-align="end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.212cm" fo:line-height="100%" fo:text-align="end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0" style:family="paragraph">
      <loext:graphic-properties draw:fill="solid" draw:fill-color="#14b8a6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1" style:family="paragraph">
      <loext:graphic-properties draw:fill="solid" draw:fill-color="#60a5fa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2" style:family="paragraph">
      <loext:graphic-properties draw:fill="solid" draw:fill-color="#a78bfa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.212cm" fo:line-height="11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4" style:family="paragraph">
      <loext:graphic-properties draw:fill="none"/>
      <style:paragraph-properties fo:margin-left="0cm" fo:margin-right="0cm" fo:margin-top="0cm" fo:margin-bottom="0.212cm" fo:line-height="11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5" style:family="paragraph">
      <style:paragraph-properties fo:margin-left="0cm" fo:margin-right="0cm" fo:margin-top="0cm" fo:margin-bottom="0.106cm" fo:line-height="105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.106cm" fo:line-height="105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7" style:family="paragraph">
      <style:paragraph-properties fo:margin-left="0cm" fo:margin-right="0cm" fo:margin-top="0cm" fo:margin-bottom="0.212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.212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9" style:family="paragraph">
      <style:paragraph-properties fo:margin-left="0cm" fo:margin-right="0cm" fo:margin-top="0cm" fo:margin-bottom="0.212cm" fo:line-height="115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.212cm" fo:line-height="115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31" style:family="paragraph">
      <loext:graphic-properties draw:fill="solid" draw:fill-color="#60a5f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2" style:family="paragraph">
      <style:paragraph-properties fo:margin-left="0cm" fo:margin-right="0cm" fo:margin-top="0cm" fo:margin-bottom="0.212cm" fo:line-height="115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3" style:family="paragraph">
      <loext:graphic-properties draw:fill="none"/>
      <style:paragraph-properties fo:margin-left="0cm" fo:margin-right="0cm" fo:margin-top="0cm" fo:margin-bottom="0.212cm" fo:line-height="115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34" style:family="paragraph">
      <style:paragraph-properties fo:margin-left="0cm" fo:margin-right="0cm" fo:margin-top="0cm" fo:margin-bottom="0.141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5" style:family="paragraph">
      <loext:graphic-properties draw:fill="none"/>
      <style:paragraph-properties fo:margin-left="0cm" fo:margin-right="0cm" fo:margin-top="0cm" fo:margin-bottom="0.141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36" style:family="paragraph">
      <style:paragraph-properties fo:margin-left="0cm" fo:margin-right="0cm" fo:margin-top="0cm" fo:margin-bottom="0.141cm" fo:line-height="11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7" style:family="paragraph">
      <loext:graphic-properties draw:fill="none"/>
      <style:paragraph-properties fo:margin-left="0cm" fo:margin-right="0cm" fo:margin-top="0cm" fo:margin-bottom="0.141cm" fo:line-height="11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38" style:family="paragraph">
      <loext:graphic-properties draw:fill="solid" draw:fill-color="#a78bf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9" style:family="paragraph">
      <loext:graphic-properties draw:fill="solid" draw:fill-color="#cbd5e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0" style:family="paragraph">
      <style:paragraph-properties fo:margin-left="0cm" fo:margin-right="0cm" fo:margin-top="0cm" fo:margin-bottom="0.247cm" fo:line-height="105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41" style:family="paragraph">
      <loext:graphic-properties draw:fill="none"/>
      <style:paragraph-properties fo:margin-left="0cm" fo:margin-right="0cm" fo:margin-top="0cm" fo:margin-bottom="0.247cm" fo:line-height="105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42" style:family="paragraph">
      <style:paragraph-properties fo:margin-left="0cm" fo:margin-right="0cm" fo:margin-top="0cm" fo:margin-bottom="0.212cm" fo:line-height="105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43" style:family="paragraph">
      <loext:graphic-properties draw:fill="none"/>
      <style:paragraph-properties fo:margin-left="0cm" fo:margin-right="0cm" fo:margin-top="0cm" fo:margin-bottom="0.212cm" fo:line-height="105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44" style:family="paragraph">
      <style:paragraph-properties fo:margin-left="0cm" fo:margin-right="0cm" fo:margin-top="0cm" fo:margin-bottom="0.282cm" fo:line-height="12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45" style:family="paragraph">
      <loext:graphic-properties draw:fill="none"/>
      <style:paragraph-properties fo:margin-left="0cm" fo:margin-right="0cm" fo:margin-top="0cm" fo:margin-bottom="0.282cm" fo:line-height="12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46pt" fo:letter-spacing="normal" fo:language="en" fo:country="US" fo:font-style="normal" style:text-underline-style="none" fo:font-weight="bold" fo:background-color="transparent" style:font-size-asian="46pt" style:font-style-asian="normal" style:font-weight-asian="bold" style:font-size-complex="46pt" style:font-style-complex="normal" style:font-weight-complex="bold"/>
    </style:style>
    <style:style style:name="T4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Segoe U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Segoe U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f2a43" loext:opacity="100%" style:text-outline="false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f2a43" loext:opacity="100%" style:text-outline="false" style:text-line-through-style="none" style:text-line-through-type="none" style:text-position="0% 100%" style:font-name="Segoe U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f2a43" loext:opacity="100%" style:text-outline="false" style:text-line-through-style="none" style:text-line-through-type="none" style:text-position="0% 100%" style:font-name="Segoe UI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13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Segoe U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font-variant="normal" fo:text-transform="none" fo:color="#b47609" loext:opacity="100%" style:text-outline="false" style:text-line-through-style="none" style:text-line-through-type="none" style:text-position="0% 100%" style:font-name="Segoe U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Segoe U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60a5fa" loext:opacity="100%" style:text-outline="false" style:text-line-through-style="none" style:text-line-through-type="none" style:text-position="0% 100%" style:font-name="Segoe U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a78bfa" loext:opacity="100%" style:text-outline="false" style:text-line-through-style="none" style:text-line-through-type="none" style:text-position="0% 100%" style:font-name="Segoe U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b47609" loext:opacity="100%" style:text-outline="false" style:text-line-through-style="none" style:text-line-through-type="none" style:text-position="0% 100%" style:font-name="Segoe UI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fo:font-variant="normal" fo:text-transform="none" fo:color="#0f2a43" loext:opacity="100%" style:text-outline="false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21" style:family="text">
      <style:text-properties fo:font-variant="normal" fo:text-transform="none" fo:color="#0f2a43" loext:opacity="100%" style:text-outline="false" style:text-line-through-style="none" style:text-line-through-type="none" style:text-position="0% 100%" style:font-name="Segoe U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24" style:family="text">
      <style:text-properties fo:font-variant="normal" fo:text-transform="none" fo:color="#0f2a43" loext:opacity="100%" style:text-outline="false" style:text-line-through-style="none" style:text-line-through-type="none" style:text-position="0% 100%" style:font-name="Segoe UI" fo:font-size="17pt" fo:letter-spacing="normal" fo:language="en" fo:country="US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/>
    </style:style>
    <style:style style:name="T25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Segoe U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6" style:family="text">
      <style:text-properties fo:font-variant="normal" fo:text-transform="none" fo:color="#0f2a43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Segoe U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28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Segoe U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9" style:family="text">
      <style:text-properties fo:font-variant="normal" fo:text-transform="none" fo:color="#60a5fa" loext:opacity="100%" style:text-outline="false" style:text-line-through-style="none" style:text-line-through-type="none" style:text-position="0% 100%" style:font-name="Segoe U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2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font-variant="normal" fo:text-transform="none" fo:color="#0f2a43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Segoe UI" fo:font-size="12.5pt" fo:letter-spacing="normal" fo:language="en" fo:country="US" fo:font-style="normal" style:text-underline-style="none" fo:font-weight="normal" fo:background-color="transparent" style:font-size-asian="12.5pt" style:font-style-asian="normal" style:font-weight-asian="normal" style:font-size-complex="12.5pt" style:font-style-complex="normal" style:font-weight-complex="normal"/>
    </style:style>
    <style:style style:name="T35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Segoe UI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Segoe U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font-variant="normal" fo:text-transform="none" fo:color="#0f2a43" loext:opacity="100%" style:text-outline="false" style:text-line-through-style="none" style:text-line-through-type="none" style:text-position="0% 100%" style:font-name="Segoe UI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40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Segoe UI" fo:font-size="12.5pt" fo:letter-spacing="normal" fo:language="en" fo:country="US" fo:font-style="normal" style:text-underline-style="none" fo:font-weight="normal" fo:background-color="transparent" style:font-size-asian="12.5pt" style:font-style-asian="normal" style:font-weight-asian="normal" style:font-size-complex="12.5pt" style:font-style-complex="normal" style:font-weight-complex="normal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42" style:family="text">
      <style:text-properties fo:font-variant="normal" fo:text-transform="none" fo:color="#60a5fa" loext:opacity="100%" style:text-outline="false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43" style:family="text">
      <style:text-properties fo:font-variant="normal" fo:text-transform="none" fo:color="#a78bfa" loext:opacity="100%" style:text-outline="false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44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45" style:family="text">
      <style:text-properties fo:font-variant="normal" fo:text-transform="none" fo:color="#60a5fa" loext:opacity="100%" style:text-outline="false" style:text-line-through-style="none" style:text-line-through-type="none" style:text-position="0% 100%" style:font-name="Segoe UI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46" style:family="text">
      <style:text-properties fo:font-variant="normal" fo:text-transform="none" fo:color="#0f2a43" loext:opacity="100%" style:text-outline="false" style:text-line-through-style="none" style:text-line-through-type="none" style:text-position="0% 100%" style:font-name="Segoe UI" fo:font-size="16.5pt" fo:letter-spacing="normal" fo:language="en" fo:country="US" fo:font-style="normal" style:text-underline-style="none" fo:font-weight="bold" fo:background-color="transparent" style:font-size-asian="16.5pt" style:font-style-asian="normal" style:font-weight-asian="bold" style:font-size-complex="16.5pt" style:font-style-complex="normal" style:font-weight-complex="bold"/>
    </style:style>
    <style:style style:name="T47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3.5pt" fo:letter-spacing="normal" fo:language="en" fo:country="US" fo:font-style="normal" style:text-underline-style="none" fo:font-weight="bold" fo:background-color="transparent" style:font-size-asian="13.5pt" style:font-style-asian="normal" style:font-weight-asian="bold" style:font-size-complex="13.5pt" style:font-style-complex="normal" style:font-weight-complex="bold"/>
    </style:style>
    <style:style style:name="T49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Segoe UI" fo:font-size="12.5pt" fo:letter-spacing="normal" fo:language="en" fo:country="US" fo:font-style="normal" style:text-underline-style="none" fo:font-weight="normal" fo:background-color="transparent" style:font-size-asian="12.5pt" style:font-style-asian="normal" style:font-weight-asian="normal" style:font-size-complex="12.5pt" style:font-style-complex="normal" style:font-weight-complex="normal"/>
    </style:style>
    <style:style style:name="T50" style:family="text">
      <style:text-properties fo:font-variant="normal" fo:text-transform="none" fo:color="#a78bfa" loext:opacity="100%" style:text-outline="false" style:text-line-through-style="none" style:text-line-through-type="none" style:text-position="0% 100%" style:font-name="Segoe UI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51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Segoe U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Segoe U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54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Segoe U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55" style:family="text">
      <style:text-properties fo:font-variant="normal" fo:text-transform="none" fo:color="#0f2a43" loext:opacity="100%" style:text-outline="false" style:text-line-through-style="none" style:text-line-through-type="none" style:text-position="0% 100%" style:font-name="Segoe U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56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Segoe U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Segoe U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58" style:family="text">
      <style:text-properties fo:font-variant="normal" fo:text-transform="none" fo:color="#0f2a43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59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Segoe UI" fo:font-size="11.5pt" fo:letter-spacing="normal" fo:language="en" fo:country="US" fo:font-style="normal" style:text-underline-style="none" fo:font-weight="normal" fo:background-color="transparent" style:font-size-asian="11.5pt" style:font-style-asian="normal" style:font-weight-asian="normal" style:font-size-complex="11.5pt" style:font-style-complex="normal" style:font-weight-complex="normal"/>
    </style:style>
    <style:style style:name="T60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Segoe U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6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52pt" fo:letter-spacing="normal" fo:language="en" fo:country="US" fo:font-style="normal" style:text-underline-style="none" fo:font-weight="bold" fo:background-color="transparent" style:font-size-asian="52pt" style:font-style-asian="normal" style:font-weight-asian="bold" style:font-size-complex="52pt" style:font-style-complex="normal" style:font-weight-complex="bold"/>
    </style:style>
    <style:style style:name="T62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59e0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cbd5e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94a3b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6474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f2a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b4760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14b8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60a5f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a78bf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1e293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0.888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" draw:text-style-name="P5" draw:layer="layout" svg:width="7.619cm" svg:height="2.539cm" svg:x="2.286cm" svg:y="2.54cm">
          <text:p text:style-name="P4"><text:span text:style-name="T2">📦 <text:s/>WM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7" draw:layer="layout" svg:width="29.209cm" svg:height="4.063cm" svg:x="2.159cm" svg:y="5.334cm">
          <text:p text:style-name="P6"><text:span text:style-name="T3">Sistema de Gestão de Armazém</text:span></text:p>
          <text:p text:style-name="P6"><text:span text:style-name="T4">Controle de estoque em tempo real, localização e inventár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8" draw:layer="layout" svg:width="10.667cm" svg:height="0.105cm" svg:x="2.286cm" svg:y="10.54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5" draw:layer="layout" svg:width="27.939cm" svg:height="1.523cm" svg:x="2.159cm" svg:y="11.176cm">
          <text:p text:style-name="P4"><text:span text:style-name="T5">Tópicos Especiais em Computação I — B <text:s/>· <text:s/>Trabalho Fin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7" draw:text-style-name="P9" draw:layer="layout" svg:width="6.984cm" svg:height="2.666cm" svg:x="2.286cm" svg:y="13.589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8" draw:style-name="gr8" draw:text-style-name="P11" draw:layer="layout" svg:width="6.984cm" svg:height="0.928cm" svg:x="2.286cm" svg:y="13.97cm">
          <text:p text:style-name="P10"><text:span text:style-name="T6">Samuel Maci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7" draw:text-style-name="P9" draw:layer="layout" svg:width="6.984cm" svg:height="2.666cm" svg:x="9.779cm" svg:y="13.589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0" draw:style-name="gr9" draw:text-style-name="P11" draw:layer="layout" svg:width="6.984cm" svg:height="1.465cm" svg:x="9.779cm" svg:y="13.97cm">
          <text:p text:style-name="P10"><text:span text:style-name="T6">Daniel Dewes</text:span></text:p>
          <text:p text:style-name="P10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7" draw:text-style-name="P9" draw:layer="layout" svg:width="6.984cm" svg:height="2.666cm" svg:x="17.272cm" svg:y="13.589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2" draw:style-name="gr10" draw:text-style-name="P11" draw:layer="layout" svg:width="6.984cm" svg:height="1.465cm" svg:x="17.272cm" svg:y="13.97cm">
          <text:p text:style-name="P10"><text:span text:style-name="T6">Cesario Junior</text:span></text:p>
          <text:p text:style-name="P10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7" draw:text-style-name="P9" draw:layer="layout" svg:width="6.984cm" svg:height="2.666cm" svg:x="24.765cm" svg:y="13.589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4" draw:style-name="gr11" draw:text-style-name="P11" draw:layer="layout" svg:width="6.984cm" svg:height="1.465cm" svg:x="24.765cm" svg:y="13.97cm">
          <text:p text:style-name="P10"><text:span text:style-name="T6">Yuri Carvalho</text:span></text:p>
          <text:p text:style-name="P10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2" draw:text-style-name="P5" draw:layer="layout" svg:width="27.939cm" svg:height="1.015cm" svg:x="2.159cm" svg:y="17.018cm">
          <text:p text:style-name="P4"><text:span text:style-name="T8">2026 <text:s/>· <text:s/>github.com/AtomicWorm/sistemaWM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Rectangle 1" draw:style-name="gr14" draw:text-style-name="P13" draw:layer="layout" svg:width="33.865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5" draw:text-style-name="P5" draw:layer="layout" svg:width="25.399cm" svg:height="2.031cm" svg:x="1.524cm" svg:y="1.27cm">
          <text:p text:style-name="P4"><text:span text:style-name="T9">Roteiro da Apresenta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6" draw:text-style-name="P5" draw:layer="layout" svg:width="27.939cm" svg:height="1.269cm" svg:x="1.575cm" svg:y="3.175cm">
          <text:p text:style-name="P4"><text:span text:style-name="T10">Quatro blocos — um por integran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7" draw:text-style-name="P14" draw:layer="layout" svg:width="30.733cm" svg:height="2.666cm" svg:x="1.524cm" svg:y="5.0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5" draw:style-name="gr18" draw:text-style-name="P15" draw:layer="layout" svg:width="2.412cm" svg:height="1.65cm" svg:x="2.159cm" svg:y="5.588cm">
          <text:p text:style-name="P1"><text:span text:style-name="T11">01</text:span></text:p>
          <draw:enhanced-geometry draw:mirror-horizontal="false" draw:mirror-vertical="false" draw:glue-points="?f8 0 0 ?f9 ?f8 ?f10 ?f11 ?f9" draw:text-areas="?f5 ?f5 ?f6 ?f7" svg:viewBox="0 0 0 0" draw:type="ooxml-roundRect" draw:modifiers="2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6" draw:style-name="gr19" draw:text-style-name="P17" draw:layer="layout" svg:width="18.287cm" svg:height="2.158cm" svg:x="5.207cm" svg:y="5.385cm">
          <text:p text:style-name="P16"><text:span text:style-name="T12">Problema &amp; Contexto</text:span></text:p>
          <text:p text:style-name="P16"><text:span text:style-name="T13">Dor do negócio, público-alvo e visão geral da solu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0" draw:text-style-name="P19" draw:layer="layout" svg:width="8.127cm" svg:height="1.269cm" svg:x="23.622cm" svg:y="5.791cm">
          <text:p text:style-name="P18"><text:span text:style-name="T14">Samuel Maci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17" draw:text-style-name="P14" draw:layer="layout" svg:width="30.733cm" svg:height="2.666cm" svg:x="1.524cm" svg:y="8.12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9" draw:style-name="gr21" draw:text-style-name="P20" draw:layer="layout" svg:width="2.412cm" svg:height="1.65cm" svg:x="2.159cm" svg:y="8.636cm">
          <text:p text:style-name="P1"><text:span text:style-name="T15">02</text:span></text:p>
          <draw:enhanced-geometry draw:mirror-horizontal="false" draw:mirror-vertical="false" draw:glue-points="?f8 0 0 ?f9 ?f8 ?f10 ?f11 ?f9" draw:text-areas="?f5 ?f5 ?f6 ?f7" svg:viewBox="0 0 0 0" draw:type="ooxml-roundRect" draw:modifiers="2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0" draw:style-name="gr22" draw:text-style-name="P17" draw:layer="layout" svg:width="18.287cm" svg:height="2.158cm" svg:x="5.207cm" svg:y="8.433cm">
          <text:p text:style-name="P16"><text:span text:style-name="T12">Funcionalidades &amp; Fluxos</text:span></text:p>
          <text:p text:style-name="P16"><text:span text:style-name="T13">O que o sistema faz e os 5 fluxos de opera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3" draw:text-style-name="P19" draw:layer="layout" svg:width="8.127cm" svg:height="1.269cm" svg:x="23.622cm" svg:y="8.839cm">
          <text:p text:style-name="P18"><text:span text:style-name="T16">Daniel Dew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17" draw:text-style-name="P14" draw:layer="layout" svg:width="30.733cm" svg:height="2.666cm" svg:x="1.524cm" svg:y="11.176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3" draw:style-name="gr24" draw:text-style-name="P21" draw:layer="layout" svg:width="2.412cm" svg:height="1.65cm" svg:x="2.159cm" svg:y="11.684cm">
          <text:p text:style-name="P1"><text:span text:style-name="T15">03</text:span></text:p>
          <draw:enhanced-geometry draw:mirror-horizontal="false" draw:mirror-vertical="false" draw:glue-points="?f8 0 0 ?f9 ?f8 ?f10 ?f11 ?f9" draw:text-areas="?f5 ?f5 ?f6 ?f7" svg:viewBox="0 0 0 0" draw:type="ooxml-roundRect" draw:modifiers="2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4" draw:style-name="gr25" draw:text-style-name="P17" draw:layer="layout" svg:width="18.287cm" svg:height="2.158cm" svg:x="5.207cm" svg:y="11.481cm">
          <text:p text:style-name="P16"><text:span text:style-name="T12">Arquitetura &amp; Stack</text:span></text:p>
          <text:p text:style-name="P16"><text:span text:style-name="T13">Camadas, tecnologias e ciclo de uma requisi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26" draw:text-style-name="P19" draw:layer="layout" svg:width="8.127cm" svg:height="1.269cm" svg:x="23.622cm" svg:y="11.887cm">
          <text:p text:style-name="P18"><text:span text:style-name="T17">Cesario Juni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6" draw:style-name="gr17" draw:text-style-name="P14" draw:layer="layout" svg:width="30.733cm" svg:height="2.666cm" svg:x="1.524cm" svg:y="14.224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7" draw:style-name="gr27" draw:text-style-name="P22" draw:layer="layout" svg:width="2.412cm" svg:height="1.65cm" svg:x="2.159cm" svg:y="14.732cm">
          <text:p text:style-name="P1"><text:span text:style-name="T15">04</text:span></text:p>
          <draw:enhanced-geometry draw:mirror-horizontal="false" draw:mirror-vertical="false" draw:glue-points="?f8 0 0 ?f9 ?f8 ?f10 ?f11 ?f9" draw:text-areas="?f5 ?f5 ?f6 ?f7" svg:viewBox="0 0 0 0" draw:type="ooxml-roundRect" draw:modifiers="2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8" draw:style-name="gr28" draw:text-style-name="P17" draw:layer="layout" svg:width="18.287cm" svg:height="2.158cm" svg:x="5.207cm" svg:y="14.529cm">
          <text:p text:style-name="P16"><text:span text:style-name="T12">Dados, API &amp; Processo</text:span></text:p>
          <text:p text:style-name="P16"><text:span text:style-name="T13">Modelo de dados, API REST e método de desenvolvimen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9" draw:text-style-name="P19" draw:layer="layout" svg:width="8.127cm" svg:height="1.269cm" svg:x="23.622cm" svg:y="14.935cm">
          <text:p text:style-name="P18"><text:span text:style-name="T18">Yuri Carvalh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Rectangle 1" draw:style-name="gr14" draw:text-style-name="P13" draw:layer="layout" svg:width="33.865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0.558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0" draw:text-style-name="P5" draw:layer="layout" svg:width="21.589cm" svg:height="1.015cm" svg:x="1.524cm" svg:y="1.143cm">
          <text:p text:style-name="P4"><text:span text:style-name="T19">BLOCO 01 · CONTEX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1" draw:text-style-name="P5" draw:layer="layout" svg:width="23.367cm" svg:height="2.539cm" svg:x="1.473cm" svg:y="2.032cm">
          <text:p text:style-name="P4"><text:span text:style-name="T20">O Problem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32" draw:text-style-name="P15" draw:layer="layout" svg:width="6.857cm" svg:height="1.066cm" svg:x="25.738cm" svg:y="1.067cm">
          <text:p text:style-name="P1"><text:span text:style-name="T21">Apresenta: Samuel Maciel</text:span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6" draw:style-name="gr33" draw:text-style-name="P24" draw:layer="layout" svg:width="30.479cm" svg:height="2.031cm" svg:x="1.524cm" svg:y="4.953cm">
          <text:p text:style-name="P23"><text:span text:style-name="T22">Armazéns que dependem de processos manuais perdem controle do que têm e de onde está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17" draw:text-style-name="P14" draw:layer="layout" svg:width="15.112cm" svg:height="4.19cm" svg:x="1.524cm" svg:y="7.874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8" draw:style-name="gr34" draw:text-style-name="P5" draw:layer="layout" svg:width="2.539cm" svg:height="2.031cm" svg:x="2.286cm" svg:y="8.433cm">
          <text:p text:style-name="P4"><text:span text:style-name="T23">📉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5" draw:text-style-name="P26" draw:layer="layout" svg:width="11.302cm" svg:height="3.047cm" svg:x="4.699cm" svg:y="8.509cm">
          <text:p text:style-name="P25"><text:span text:style-name="T24">Erros de contagem</text:span></text:p>
          <text:p text:style-name="P25"><text:span text:style-name="T13">Perdas de mercadoria e divergências constantes de sal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17" draw:text-style-name="P14" draw:layer="layout" svg:width="15.112cm" svg:height="4.19cm" svg:x="17.145cm" svg:y="7.874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1" draw:style-name="gr36" draw:text-style-name="P5" draw:layer="layout" svg:width="2.539cm" svg:height="2.031cm" svg:x="17.907cm" svg:y="8.433cm">
          <text:p text:style-name="P4"><text:span text:style-name="T23">⏱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7" draw:text-style-name="P26" draw:layer="layout" svg:width="11.302cm" svg:height="3.047cm" svg:x="20.32cm" svg:y="8.509cm">
          <text:p text:style-name="P25"><text:span text:style-name="T24">Tempo perdido</text:span></text:p>
          <text:p text:style-name="P25"><text:span text:style-name="T13">Operadores procuram produtos sem guia de localiza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17" draw:text-style-name="P14" draw:layer="layout" svg:width="15.112cm" svg:height="4.19cm" svg:x="1.524cm" svg:y="12.573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4" draw:style-name="gr38" draw:text-style-name="P5" draw:layer="layout" svg:width="2.539cm" svg:height="2.031cm" svg:x="2.286cm" svg:y="13.132cm">
          <text:p text:style-name="P4"><text:span text:style-name="T23">📦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9" draw:text-style-name="P26" draw:layer="layout" svg:width="11.302cm" svg:height="3.047cm" svg:x="4.699cm" svg:y="13.208cm">
          <text:p text:style-name="P25"><text:span text:style-name="T24">Reposição errada</text:span></text:p>
          <text:p text:style-name="P25"><text:span text:style-name="T13">Falta de itens essenciais ou excesso de estoque para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6" draw:style-name="gr17" draw:text-style-name="P14" draw:layer="layout" svg:width="15.112cm" svg:height="4.19cm" svg:x="17.145cm" svg:y="12.573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7" draw:style-name="gr40" draw:text-style-name="P5" draw:layer="layout" svg:width="2.539cm" svg:height="2.031cm" svg:x="17.907cm" svg:y="13.132cm">
          <text:p text:style-name="P4"><text:span text:style-name="T23">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1" draw:text-style-name="P26" draw:layer="layout" svg:width="11.302cm" svg:height="3.047cm" svg:x="20.32cm" svg:y="13.208cm">
          <text:p text:style-name="P25"><text:span text:style-name="T24">Prejuízo direto</text:span></text:p>
          <text:p text:style-name="P25"><text:span text:style-name="T13">Atrasos nas entregas e desgaste da equipe operacion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Rectangle 1" draw:style-name="gr14" draw:text-style-name="P13" draw:layer="layout" svg:width="33.865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0.558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2" draw:text-style-name="P5" draw:layer="layout" svg:width="21.589cm" svg:height="1.015cm" svg:x="1.524cm" svg:y="1.143cm">
          <text:p text:style-name="P4"><text:span text:style-name="T19">BLOCO 01 · CONTEX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3" draw:text-style-name="P5" draw:layer="layout" svg:width="23.367cm" svg:height="2.539cm" svg:x="1.473cm" svg:y="2.032cm">
          <text:p text:style-name="P4"><text:span text:style-name="T20">Para quem é o sistem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44" draw:text-style-name="P15" draw:layer="layout" svg:width="6.857cm" svg:height="1.066cm" svg:x="25.738cm" svg:y="1.067cm">
          <text:p text:style-name="P1"><text:span text:style-name="T21">Apresenta: Samuel Maciel</text:span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6" draw:style-name="gr17" draw:text-style-name="P14" draw:layer="layout" svg:width="10.032cm" svg:height="11.175cm" svg:x="1.524cm" svg:y="5.58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7" draw:style-name="gr5" draw:text-style-name="P8" draw:layer="layout" svg:width="10.032cm" svg:height="0.456cm" svg:x="1.524cm" svg:y="5.58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8" draw:style-name="gr45" draw:text-style-name="P28" draw:layer="layout" svg:width="10.032cm" svg:height="2.539cm" svg:x="1.524cm" svg:y="6.858cm">
          <text:p text:style-name="P27"><text:span text:style-name="T25">👔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6" draw:text-style-name="P28" draw:layer="layout" svg:width="8.508cm" svg:height="1.523cm" svg:x="2.286cm" svg:y="10.033cm">
          <text:p text:style-name="P27"><text:span text:style-name="T26">Gestor de Armazé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7" draw:text-style-name="P30" draw:layer="layout" svg:width="8.254cm" svg:height="4.571cm" svg:x="2.413cm" svg:y="11.684cm">
          <text:p text:style-name="P29"><text:span text:style-name="T27">Visão geral do estoque a qualquer momento, alertas de reposição e decisões com base em dados confiávei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17" draw:text-style-name="P14" draw:layer="layout" svg:width="10.032cm" svg:height="11.175cm" svg:x="12.065cm" svg:y="5.58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2" draw:style-name="gr2" draw:text-style-name="P3" draw:layer="layout" svg:width="10.032cm" svg:height="0.456cm" svg:x="12.065cm" svg:y="5.58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3" draw:style-name="gr48" draw:text-style-name="P28" draw:layer="layout" svg:width="10.032cm" svg:height="2.539cm" svg:x="12.065cm" svg:y="6.858cm">
          <text:p text:style-name="P27"><text:span text:style-name="T28">🧰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9" draw:text-style-name="P28" draw:layer="layout" svg:width="8.508cm" svg:height="1.523cm" svg:x="12.827cm" svg:y="10.033cm">
          <text:p text:style-name="P27"><text:span text:style-name="T26">Operador de Estoqu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0" draw:text-style-name="P30" draw:layer="layout" svg:width="8.254cm" svg:height="4.571cm" svg:x="12.954cm" svg:y="11.684cm">
          <text:p text:style-name="P29"><text:span text:style-name="T27">Recebe, guarda, separa e conta produtos com orientação clara de onde guardar e buscar cada item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6" draw:style-name="gr17" draw:text-style-name="P14" draw:layer="layout" svg:width="10.032cm" svg:height="11.175cm" svg:x="22.606cm" svg:y="5.58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7" draw:style-name="gr51" draw:text-style-name="P31" draw:layer="layout" svg:width="10.032cm" svg:height="0.456cm" svg:x="22.606cm" svg:y="5.58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8" draw:style-name="gr52" draw:text-style-name="P28" draw:layer="layout" svg:width="10.032cm" svg:height="2.539cm" svg:x="22.606cm" svg:y="6.858cm">
          <text:p text:style-name="P27"><text:span text:style-name="T29">🛒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53" draw:text-style-name="P28" draw:layer="layout" svg:width="8.508cm" svg:height="1.523cm" svg:x="23.368cm" svg:y="10.033cm">
          <text:p text:style-name="P27"><text:span text:style-name="T26">Compras &amp; Suprimen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4" draw:text-style-name="P30" draw:layer="layout" svg:width="8.254cm" svg:height="4.571cm" svg:x="23.495cm" svg:y="11.684cm">
          <text:p text:style-name="P29"><text:span text:style-name="T27">Decide quando e quanto comprar, com histórico de consumo e alertas automáticos de estoque mínimo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Rectangle 1" draw:style-name="gr14" draw:text-style-name="P13" draw:layer="layout" svg:width="33.865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0.558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5" draw:text-style-name="P5" draw:layer="layout" svg:width="21.589cm" svg:height="1.015cm" svg:x="1.524cm" svg:y="1.143cm">
          <text:p text:style-name="P4"><text:span text:style-name="T19">BLOCO 01 · CONTEX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6" draw:text-style-name="P5" draw:layer="layout" svg:width="23.367cm" svg:height="2.539cm" svg:x="1.473cm" svg:y="2.032cm">
          <text:p text:style-name="P4"><text:span text:style-name="T20">A solução em uma fra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57" draw:text-style-name="P15" draw:layer="layout" svg:width="6.857cm" svg:height="1.066cm" svg:x="25.738cm" svg:y="1.067cm">
          <text:p text:style-name="P1"><text:span text:style-name="T21">Apresenta: Samuel Maciel</text:span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6" draw:style-name="gr1" draw:text-style-name="P2" draw:layer="layout" svg:width="30.733cm" svg:height="3.555cm" svg:x="1.524cm" svg:y="5.20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7" draw:style-name="gr58" draw:text-style-name="P33" draw:layer="layout" svg:width="28.701cm" svg:height="2.539cm" svg:x="2.54cm" svg:y="5.715cm">
          <text:p text:style-name="P32"><text:span text:style-name="T30">Uma aplicação web que controla </text:span><text:span text:style-name="T31">entrada, saída, localização e saldo</text:span><text:span text:style-name="T30"> dos produtos do armazém — </text:span><text:span text:style-name="T32">em tempo real e com auditoria complet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17" draw:text-style-name="P14" draw:layer="layout" svg:width="15.112cm" svg:height="3.174cm" svg:x="1.524cm" svg:y="9.652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9" draw:style-name="gr2" draw:text-style-name="P3" draw:layer="layout" svg:width="0.761cm" svg:height="0.761cm" svg:x="2.286cm" svg:y="10.795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0" draw:style-name="gr59" draw:text-style-name="P17" draw:layer="layout" svg:width="12.699cm" svg:height="2.285cm" svg:x="3.683cm" svg:y="10.16cm">
          <text:p text:style-name="P16"><text:span text:style-name="T33">Cadastro &amp; organização</text:span></text:p>
          <text:p text:style-name="P16"><text:span text:style-name="T34">Produtos, fornecedores e estrutura do armazé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17" draw:text-style-name="P14" draw:layer="layout" svg:width="15.112cm" svg:height="3.174cm" svg:x="17.145cm" svg:y="9.652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2" draw:style-name="gr2" draw:text-style-name="P3" draw:layer="layout" svg:width="0.761cm" svg:height="0.761cm" svg:x="17.907cm" svg:y="10.795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3" draw:style-name="gr60" draw:text-style-name="P17" draw:layer="layout" svg:width="12.699cm" svg:height="2.285cm" svg:x="19.304cm" svg:y="10.16cm">
          <text:p text:style-name="P16"><text:span text:style-name="T33">Movimentação de estoque</text:span></text:p>
          <text:p text:style-name="P16"><text:span text:style-name="T34">Entrada, saída, devolução e transferênc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4" draw:style-name="gr17" draw:text-style-name="P14" draw:layer="layout" svg:width="15.112cm" svg:height="3.174cm" svg:x="1.524cm" svg:y="13.335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5" draw:style-name="gr2" draw:text-style-name="P3" draw:layer="layout" svg:width="0.761cm" svg:height="0.761cm" svg:x="2.286cm" svg:y="14.478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6" draw:style-name="gr61" draw:text-style-name="P17" draw:layer="layout" svg:width="12.699cm" svg:height="2.285cm" svg:x="3.683cm" svg:y="13.843cm">
          <text:p text:style-name="P16"><text:span text:style-name="T33">Localização &amp; busca</text:span></text:p>
          <text:p text:style-name="P16"><text:span text:style-name="T34">Onde cada produto está, por nome ou categor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7" draw:style-name="gr17" draw:text-style-name="P14" draw:layer="layout" svg:width="15.112cm" svg:height="3.174cm" svg:x="17.145cm" svg:y="13.335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8" draw:style-name="gr2" draw:text-style-name="P3" draw:layer="layout" svg:width="0.761cm" svg:height="0.761cm" svg:x="17.907cm" svg:y="14.478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9" draw:style-name="gr62" draw:text-style-name="P17" draw:layer="layout" svg:width="12.699cm" svg:height="2.285cm" svg:x="19.304cm" svg:y="13.843cm">
          <text:p text:style-name="P16"><text:span text:style-name="T33">Controle &amp; alertas</text:span></text:p>
          <text:p text:style-name="P16"><text:span text:style-name="T34">Saldo em tempo real, estoque mínimo e inventár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Rectangle 1" draw:style-name="gr14" draw:text-style-name="P13" draw:layer="layout" svg:width="33.865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8" draw:layer="layout" svg:width="0.558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3" draw:text-style-name="P5" draw:layer="layout" svg:width="21.589cm" svg:height="1.015cm" svg:x="1.524cm" svg:y="1.143cm">
          <text:p text:style-name="P4"><text:span text:style-name="T35">BLOCO 02 · PRODU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4" draw:text-style-name="P5" draw:layer="layout" svg:width="23.367cm" svg:height="2.539cm" svg:x="1.473cm" svg:y="2.032cm">
          <text:p text:style-name="P4"><text:span text:style-name="T20">O que o sistema faz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65" draw:text-style-name="P20" draw:layer="layout" svg:width="6.857cm" svg:height="1.066cm" svg:x="25.738cm" svg:y="1.067cm">
          <text:p text:style-name="P1"><text:span text:style-name="T36">Apresenta: Daniel Dewes</text:span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6" draw:style-name="gr17" draw:text-style-name="P14" draw:layer="layout" svg:width="15.112cm" svg:height="5.714cm" svg:x="1.524cm" svg:y="4.953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7" draw:style-name="gr66" draw:text-style-name="P5" draw:layer="layout" svg:width="13.715cm" svg:height="1.269cm" svg:x="2.286cm" svg:y="5.461cm">
          <text:p text:style-name="P4"><text:span text:style-name="T37">📋 <text:s/></text:span><text:span text:style-name="T33">Cadastro e organiza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7" draw:text-style-name="P35" draw:layer="layout" svg:width="13.461cm" svg:height="3.555cm" svg:x="2.54cm" svg:y="6.985cm">
          <text:p text:style-name="P34"><text:span text:style-name="T35">• <text:s/></text:span><text:span text:style-name="T38">Produtos com categoria e estoque mínimo</text:span></text:p>
          <text:p text:style-name="P34"><text:span text:style-name="T35">• <text:s/></text:span><text:span text:style-name="T38">Fornecedores e produtos fornecidos</text:span></text:p>
          <text:p text:style-name="P34"><text:span text:style-name="T35">• <text:s/></text:span><text:span text:style-name="T38">Armazém em áreas → corredores → posiçõ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17" draw:text-style-name="P14" draw:layer="layout" svg:width="15.112cm" svg:height="5.714cm" svg:x="17.145cm" svg:y="4.953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0" draw:style-name="gr68" draw:text-style-name="P5" draw:layer="layout" svg:width="13.715cm" svg:height="1.269cm" svg:x="17.907cm" svg:y="5.461cm">
          <text:p text:style-name="P4"><text:span text:style-name="T37">🔄 <text:s/></text:span><text:span text:style-name="T33">Movimentação de estoqu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9" draw:text-style-name="P35" draw:layer="layout" svg:width="13.461cm" svg:height="3.555cm" svg:x="18.161cm" svg:y="6.985cm">
          <text:p text:style-name="P34"><text:span text:style-name="T35">• <text:s/></text:span><text:span text:style-name="T38">Entrada ao receber mercadoria</text:span></text:p>
          <text:p text:style-name="P34"><text:span text:style-name="T35">• <text:s/></text:span><text:span text:style-name="T38">Saída por expedição ou consumo</text:span></text:p>
          <text:p text:style-name="P34"><text:span text:style-name="T35">• <text:s/></text:span><text:span text:style-name="T38">Devoluções e transferências entre posiçõ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17" draw:text-style-name="P14" draw:layer="layout" svg:width="15.112cm" svg:height="5.714cm" svg:x="1.524cm" svg:y="11.176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3" draw:style-name="gr70" draw:text-style-name="P5" draw:layer="layout" svg:width="13.715cm" svg:height="1.269cm" svg:x="2.286cm" svg:y="11.684cm">
          <text:p text:style-name="P4"><text:span text:style-name="T37">🔍 <text:s/></text:span><text:span text:style-name="T33">Localização e busc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1" draw:text-style-name="P35" draw:layer="layout" svg:width="13.461cm" svg:height="3.555cm" svg:x="2.54cm" svg:y="13.208cm">
          <text:p text:style-name="P34"><text:span text:style-name="T35">• <text:s/></text:span><text:span text:style-name="T38">Posição exata de cada produto</text:span></text:p>
          <text:p text:style-name="P34"><text:span text:style-name="T35">• <text:s/></text:span><text:span text:style-name="T38">Busca por nome ou categoria</text:span></text:p>
          <text:p text:style-name="P34"><text:span text:style-name="T35">• <text:s/></text:span><text:span text:style-name="T38">Localização rápida no armazé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5" draw:style-name="gr17" draw:text-style-name="P14" draw:layer="layout" svg:width="15.112cm" svg:height="5.714cm" svg:x="17.145cm" svg:y="11.176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6" draw:style-name="gr72" draw:text-style-name="P5" draw:layer="layout" svg:width="13.715cm" svg:height="1.269cm" svg:x="17.907cm" svg:y="11.684cm">
          <text:p text:style-name="P4"><text:span text:style-name="T37">📊 <text:s/></text:span><text:span text:style-name="T33">Controle e acompanhamen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3" draw:text-style-name="P35" draw:layer="layout" svg:width="13.461cm" svg:height="3.555cm" svg:x="18.161cm" svg:y="13.208cm">
          <text:p text:style-name="P34"><text:span text:style-name="T35">• <text:s/></text:span><text:span text:style-name="T38">Saldo atual em tempo real</text:span></text:p>
          <text:p text:style-name="P34"><text:span text:style-name="T35">• <text:s/></text:span><text:span text:style-name="T38">Alerta de estoque abaixo do mínimo</text:span></text:p>
          <text:p text:style-name="P34"><text:span text:style-name="T35">• <text:s/></text:span><text:span text:style-name="T38">Inventário com conferência físic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Rectangle 1" draw:style-name="gr14" draw:text-style-name="P13" draw:layer="layout" svg:width="33.865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8" draw:layer="layout" svg:width="0.558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4" draw:text-style-name="P5" draw:layer="layout" svg:width="21.589cm" svg:height="1.015cm" svg:x="1.524cm" svg:y="1.143cm">
          <text:p text:style-name="P4"><text:span text:style-name="T35">BLOCO 02 · OPERA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5" draw:text-style-name="P5" draw:layer="layout" svg:width="23.367cm" svg:height="2.539cm" svg:x="1.473cm" svg:y="2.032cm">
          <text:p text:style-name="P4"><text:span text:style-name="T20">Fluxos principai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76" draw:text-style-name="P20" draw:layer="layout" svg:width="6.857cm" svg:height="1.066cm" svg:x="25.738cm" svg:y="1.067cm">
          <text:p text:style-name="P1"><text:span text:style-name="T36">Apresenta: Daniel Dewes</text:span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6" draw:style-name="gr17" draw:text-style-name="P14" draw:layer="layout" svg:width="15.112cm" svg:height="11.683cm" svg:x="1.524cm" svg:y="5.0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7" draw:style-name="gr77" draw:text-style-name="P15" draw:layer="layout" svg:width="15.112cm" svg:height="1.523cm" svg:x="1.524cm" svg:y="5.08cm">
          <text:p text:style-name="P1"><text:span text:style-name="T33">Fluxo 1 — Recebimento</text:span></text:p>
          <draw:enhanced-geometry draw:mirror-horizontal="false" draw:mirror-vertical="false" draw:glue-points="?f8 0 0 ?f9 ?f8 ?f10 ?f11 ?f9" draw:text-areas="?f5 ?f5 ?f6 ?f7" svg:viewBox="0 0 0 0" draw:type="ooxml-roundRect" draw:modifiers="12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8" draw:style-name="gr78" draw:text-style-name="P15" draw:layer="layout" svg:width="1.066cm" svg:height="1.066cm" svg:x="2.286cm" svg:y="7.239cm">
          <text:p text:style-name="P1"><text:span text:style-name="T39">1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79" draw:text-style-name="P5" draw:layer="layout" svg:width="12.318cm" svg:height="1.777cm" svg:x="3.81cm" svg:y="7.137cm">
          <text:p text:style-name="P4"><text:span text:style-name="T40">Operador informa fornecedor e itens recebid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80" draw:text-style-name="P15" draw:layer="layout" svg:width="1.066cm" svg:height="1.066cm" svg:x="2.286cm" svg:y="9.017cm">
          <text:p text:style-name="P1"><text:span text:style-name="T39">2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1" draw:style-name="gr81" draw:text-style-name="P5" draw:layer="layout" svg:width="12.318cm" svg:height="1.777cm" svg:x="3.81cm" svg:y="8.915cm">
          <text:p text:style-name="P4"><text:span text:style-name="T40">Sistema confirma entrada e atualiza sal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" draw:style-name="gr82" draw:text-style-name="P15" draw:layer="layout" svg:width="1.066cm" svg:height="1.066cm" svg:x="2.286cm" svg:y="10.795cm">
          <text:p text:style-name="P1"><text:span text:style-name="T39">3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3" draw:style-name="gr83" draw:text-style-name="P5" draw:layer="layout" svg:width="12.318cm" svg:height="1.777cm" svg:x="3.81cm" svg:y="10.693cm">
          <text:p text:style-name="P4"><text:span text:style-name="T40">Sistema indica a posição de guard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4" draw:style-name="gr84" draw:text-style-name="P15" draw:layer="layout" svg:width="1.066cm" svg:height="1.066cm" svg:x="2.286cm" svg:y="12.573cm">
          <text:p text:style-name="P1"><text:span text:style-name="T39">4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5" draw:style-name="gr85" draw:text-style-name="P5" draw:layer="layout" svg:width="12.318cm" svg:height="1.777cm" svg:x="3.81cm" svg:y="12.471cm">
          <text:p text:style-name="P4"><text:span text:style-name="T40">Operador aloca e confirma a posi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86" draw:text-style-name="P15" draw:layer="layout" svg:width="1.066cm" svg:height="1.066cm" svg:x="2.286cm" svg:y="14.351cm">
          <text:p text:style-name="P1"><text:span text:style-name="T39">5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7" draw:style-name="gr87" draw:text-style-name="P5" draw:layer="layout" svg:width="12.318cm" svg:height="1.777cm" svg:x="3.81cm" svg:y="14.249cm">
          <text:p text:style-name="P4"><text:span text:style-name="T40">Estoque atualizado com posição e quantidad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17" draw:text-style-name="P14" draw:layer="layout" svg:width="15.112cm" svg:height="11.683cm" svg:x="17.145cm" svg:y="5.0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9" draw:style-name="gr88" draw:text-style-name="P20" draw:layer="layout" svg:width="15.112cm" svg:height="1.523cm" svg:x="17.145cm" svg:y="5.08cm">
          <text:p text:style-name="P1"><text:span text:style-name="T6">Fluxo 2 — Expedição</text:span></text:p>
          <draw:enhanced-geometry draw:mirror-horizontal="false" draw:mirror-vertical="false" draw:glue-points="?f8 0 0 ?f9 ?f8 ?f10 ?f11 ?f9" draw:text-areas="?f5 ?f5 ?f6 ?f7" svg:viewBox="0 0 0 0" draw:type="ooxml-roundRect" draw:modifiers="12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20" draw:style-name="gr89" draw:text-style-name="P20" draw:layer="layout" svg:width="1.066cm" svg:height="1.066cm" svg:x="17.907cm" svg:y="7.239cm">
          <text:p text:style-name="P1"><text:span text:style-name="T41">1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1" draw:style-name="gr90" draw:text-style-name="P5" draw:layer="layout" svg:width="12.318cm" svg:height="1.777cm" svg:x="19.431cm" svg:y="7.137cm">
          <text:p text:style-name="P4"><text:span text:style-name="T40">Operador informa os itens do pedi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2" draw:style-name="gr91" draw:text-style-name="P20" draw:layer="layout" svg:width="1.066cm" svg:height="1.066cm" svg:x="17.907cm" svg:y="9.017cm">
          <text:p text:style-name="P1"><text:span text:style-name="T41">2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3" draw:style-name="gr92" draw:text-style-name="P5" draw:layer="layout" svg:width="12.318cm" svg:height="1.777cm" svg:x="19.431cm" svg:y="8.915cm">
          <text:p text:style-name="P4"><text:span text:style-name="T40">Sistema indica onde cada item está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4" draw:style-name="gr93" draw:text-style-name="P20" draw:layer="layout" svg:width="1.066cm" svg:height="1.066cm" svg:x="17.907cm" svg:y="10.795cm">
          <text:p text:style-name="P1"><text:span text:style-name="T41">3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5" draw:style-name="gr94" draw:text-style-name="P5" draw:layer="layout" svg:width="12.318cm" svg:height="1.777cm" svg:x="19.431cm" svg:y="10.693cm">
          <text:p text:style-name="P4"><text:span text:style-name="T40">Operador coleta e confirma cada it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6" draw:style-name="gr95" draw:text-style-name="P20" draw:layer="layout" svg:width="1.066cm" svg:height="1.066cm" svg:x="17.907cm" svg:y="12.573cm">
          <text:p text:style-name="P1"><text:span text:style-name="T41">4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7" draw:style-name="gr96" draw:text-style-name="P5" draw:layer="layout" svg:width="12.318cm" svg:height="1.777cm" svg:x="19.431cm" svg:y="12.471cm">
          <text:p text:style-name="P4"><text:span text:style-name="T40">Operador confirma a expedi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8" draw:style-name="gr97" draw:text-style-name="P20" draw:layer="layout" svg:width="1.066cm" svg:height="1.066cm" svg:x="17.907cm" svg:y="14.351cm">
          <text:p text:style-name="P1"><text:span text:style-name="T41">5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9" draw:style-name="gr98" draw:text-style-name="P5" draw:layer="layout" svg:width="12.318cm" svg:height="1.777cm" svg:x="19.431cm" svg:y="14.249cm">
          <text:p text:style-name="P4"><text:span text:style-name="T40">Sistema registra a saída e atualiza sal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draw:custom-shape draw:name="Rectangle 1" draw:style-name="gr14" draw:text-style-name="P13" draw:layer="layout" svg:width="33.865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8" draw:layer="layout" svg:width="0.558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9" draw:text-style-name="P5" draw:layer="layout" svg:width="21.589cm" svg:height="1.015cm" svg:x="1.524cm" svg:y="1.143cm">
          <text:p text:style-name="P4"><text:span text:style-name="T35">BLOCO 02 · OPERA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0" draw:text-style-name="P5" draw:layer="layout" svg:width="23.367cm" svg:height="2.539cm" svg:x="1.473cm" svg:y="2.032cm">
          <text:p text:style-name="P4"><text:span text:style-name="T20">Mais três fluxos de apo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01" draw:text-style-name="P20" draw:layer="layout" svg:width="6.857cm" svg:height="1.066cm" svg:x="25.738cm" svg:y="1.067cm">
          <text:p text:style-name="P1"><text:span text:style-name="T36">Apresenta: Daniel Dewes</text:span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6" draw:style-name="gr17" draw:text-style-name="P14" draw:layer="layout" svg:width="30.733cm" svg:height="3.555cm" svg:x="1.524cm" svg:y="5.20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7" draw:style-name="gr51" draw:text-style-name="P31" draw:layer="layout" svg:width="0.405cm" svg:height="3.555cm" svg:x="1.524cm" svg:y="5.20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8" draw:style-name="gr102" draw:text-style-name="P5" draw:layer="layout" svg:width="2.539cm" svg:height="2.539cm" svg:x="2.54cm" svg:y="5.766cm">
          <text:p text:style-name="P4"><text:span text:style-name="T42">🔔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03" draw:text-style-name="P37" draw:layer="layout" svg:width="26.415cm" svg:height="2.793cm" svg:x="5.08cm" svg:y="5.715cm">
          <text:p text:style-name="P36"><text:span text:style-name="T24">Fluxo 3 — Alerta de Reposição</text:span></text:p>
          <text:p text:style-name="P36"><text:span text:style-name="T27">O sistema monitora o saldo e, ao cair abaixo do mínimo, gera um alerta para Compras com produto, quantidade atual e mínim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17" draw:text-style-name="P14" draw:layer="layout" svg:width="30.733cm" svg:height="3.555cm" svg:x="1.524cm" svg:y="9.271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1" draw:style-name="gr104" draw:text-style-name="P38" draw:layer="layout" svg:width="0.405cm" svg:height="3.555cm" svg:x="1.524cm" svg:y="9.271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2" draw:style-name="gr105" draw:text-style-name="P5" draw:layer="layout" svg:width="2.539cm" svg:height="2.539cm" svg:x="2.54cm" svg:y="9.83cm">
          <text:p text:style-name="P4"><text:span text:style-name="T43">📑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06" draw:text-style-name="P37" draw:layer="layout" svg:width="26.415cm" svg:height="2.793cm" svg:x="5.08cm" svg:y="9.779cm">
          <text:p text:style-name="P36"><text:span text:style-name="T24">Fluxo 4 — Inventário</text:span></text:p>
          <text:p text:style-name="P36"><text:span text:style-name="T27">Gestor inicia a contagem, operador informa o físico, o sistema compara com o registrado e destaca divergências para ajust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4" draw:style-name="gr17" draw:text-style-name="P14" draw:layer="layout" svg:width="30.733cm" svg:height="3.555cm" svg:x="1.524cm" svg:y="13.335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5" draw:style-name="gr5" draw:text-style-name="P8" draw:layer="layout" svg:width="0.405cm" svg:height="3.555cm" svg:x="1.524cm" svg:y="13.335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6" draw:style-name="gr107" draw:text-style-name="P5" draw:layer="layout" svg:width="2.539cm" svg:height="2.539cm" svg:x="2.54cm" svg:y="13.894cm">
          <text:p text:style-name="P4"><text:span text:style-name="T44">🔎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08" draw:text-style-name="P37" draw:layer="layout" svg:width="26.415cm" svg:height="2.793cm" svg:x="5.08cm" svg:y="13.843cm">
          <text:p text:style-name="P36"><text:span text:style-name="T24">Fluxo 5 — Consulta de Estoque</text:span></text:p>
          <text:p text:style-name="P36"><text:span text:style-name="T27">Usuário busca um produto e vê saldo, posição, mínimo e histórico recente para decidir repor, transferir ou registra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Rectangle 1" draw:style-name="gr14" draw:text-style-name="P13" draw:layer="layout" svg:width="33.865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1" draw:text-style-name="P31" draw:layer="layout" svg:width="0.558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09" draw:text-style-name="P5" draw:layer="layout" svg:width="21.589cm" svg:height="1.015cm" svg:x="1.524cm" svg:y="1.143cm">
          <text:p text:style-name="P4"><text:span text:style-name="T45">BLOCO 03 · ENGENHAR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0" draw:text-style-name="P5" draw:layer="layout" svg:width="23.367cm" svg:height="2.539cm" svg:x="1.473cm" svg:y="2.032cm">
          <text:p text:style-name="P4"><text:span text:style-name="T20">Stack Tecnológic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11" draw:text-style-name="P21" draw:layer="layout" svg:width="6.857cm" svg:height="1.066cm" svg:x="25.738cm" svg:y="1.067cm">
          <text:p text:style-name="P1"><text:span text:style-name="T36">Apresenta: Cesario Junior</text:span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6" draw:style-name="gr17" draw:text-style-name="P14" draw:layer="layout" svg:width="9.905cm" svg:height="3.428cm" svg:x="1.524cm" svg:y="5.20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7" draw:style-name="gr2" draw:text-style-name="P3" draw:layer="layout" svg:width="0.355cm" svg:height="3.428cm" svg:x="1.524cm" svg:y="5.20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8" draw:style-name="gr112" draw:text-style-name="P26" draw:layer="layout" svg:width="8.381cm" svg:height="2.539cm" svg:x="2.54cm" svg:y="5.766cm">
          <text:p text:style-name="P25"><text:span text:style-name="T46">Next.js 15</text:span></text:p>
          <text:p text:style-name="P25"><text:span text:style-name="T34">Framework full-stack (Pages Router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17" draw:text-style-name="P14" draw:layer="layout" svg:width="9.905cm" svg:height="3.428cm" svg:x="11.862cm" svg:y="5.20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0" draw:style-name="gr2" draw:text-style-name="P3" draw:layer="layout" svg:width="0.355cm" svg:height="3.428cm" svg:x="11.862cm" svg:y="5.20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1" draw:style-name="gr113" draw:text-style-name="P26" draw:layer="layout" svg:width="8.381cm" svg:height="2.539cm" svg:x="12.878cm" svg:y="5.766cm">
          <text:p text:style-name="P25"><text:span text:style-name="T46">TypeScript 5</text:span></text:p>
          <text:p text:style-name="P25"><text:span text:style-name="T34">Tipagem estática de ponta a pon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17" draw:text-style-name="P14" draw:layer="layout" svg:width="9.905cm" svg:height="3.428cm" svg:x="22.2cm" svg:y="5.20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3" draw:style-name="gr2" draw:text-style-name="P3" draw:layer="layout" svg:width="0.355cm" svg:height="3.428cm" svg:x="22.2cm" svg:y="5.20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4" draw:style-name="gr114" draw:text-style-name="P26" draw:layer="layout" svg:width="8.381cm" svg:height="2.539cm" svg:x="23.216cm" svg:y="5.766cm">
          <text:p text:style-name="P25"><text:span text:style-name="T46">PostgreSQL</text:span></text:p>
          <text:p text:style-name="P25"><text:span text:style-name="T34">Banco de dados relacion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5" draw:style-name="gr17" draw:text-style-name="P14" draw:layer="layout" svg:width="9.905cm" svg:height="3.428cm" svg:x="1.524cm" svg:y="9.144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6" draw:style-name="gr2" draw:text-style-name="P3" draw:layer="layout" svg:width="0.355cm" svg:height="3.428cm" svg:x="1.524cm" svg:y="9.144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7" draw:style-name="gr115" draw:text-style-name="P26" draw:layer="layout" svg:width="8.381cm" svg:height="2.539cm" svg:x="2.54cm" svg:y="9.703cm">
          <text:p text:style-name="P25"><text:span text:style-name="T46">Prisma ORM</text:span></text:p>
          <text:p text:style-name="P25"><text:span text:style-name="T34">Acesso a dados e migraçõ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17" draw:text-style-name="P14" draw:layer="layout" svg:width="9.905cm" svg:height="3.428cm" svg:x="11.862cm" svg:y="9.144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9" draw:style-name="gr2" draw:text-style-name="P3" draw:layer="layout" svg:width="0.355cm" svg:height="3.428cm" svg:x="11.862cm" svg:y="9.144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0" draw:style-name="gr116" draw:text-style-name="P26" draw:layer="layout" svg:width="8.381cm" svg:height="2.539cm" svg:x="12.878cm" svg:y="9.703cm">
          <text:p text:style-name="P25"><text:span text:style-name="T46">NextAuth.js</text:span></text:p>
          <text:p text:style-name="P25"><text:span text:style-name="T34">Autenticação por JWT + Credentia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1" draw:style-name="gr17" draw:text-style-name="P14" draw:layer="layout" svg:width="9.905cm" svg:height="3.428cm" svg:x="22.2cm" svg:y="9.144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22" draw:style-name="gr2" draw:text-style-name="P3" draw:layer="layout" svg:width="0.355cm" svg:height="3.428cm" svg:x="22.2cm" svg:y="9.144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3" draw:style-name="gr117" draw:text-style-name="P26" draw:layer="layout" svg:width="8.381cm" svg:height="2.539cm" svg:x="23.216cm" svg:y="9.703cm">
          <text:p text:style-name="P25"><text:span text:style-name="T46">Zod</text:span></text:p>
          <text:p text:style-name="P25"><text:span text:style-name="T34">Validação no cliente e no servid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4" draw:style-name="gr17" draw:text-style-name="P14" draw:layer="layout" svg:width="9.905cm" svg:height="3.428cm" svg:x="1.524cm" svg:y="13.081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25" draw:style-name="gr2" draw:text-style-name="P3" draw:layer="layout" svg:width="0.355cm" svg:height="3.428cm" svg:x="1.524cm" svg:y="13.081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6" draw:style-name="gr118" draw:text-style-name="P26" draw:layer="layout" svg:width="8.381cm" svg:height="2.539cm" svg:x="2.54cm" svg:y="13.64cm">
          <text:p text:style-name="P25"><text:span text:style-name="T46">React Hook Form</text:span></text:p>
          <text:p text:style-name="P25"><text:span text:style-name="T34">Formulários performátic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7" draw:style-name="gr17" draw:text-style-name="P14" draw:layer="layout" svg:width="9.905cm" svg:height="3.428cm" svg:x="11.862cm" svg:y="13.081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28" draw:style-name="gr2" draw:text-style-name="P3" draw:layer="layout" svg:width="0.355cm" svg:height="3.428cm" svg:x="11.862cm" svg:y="13.081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9" draw:style-name="gr119" draw:text-style-name="P26" draw:layer="layout" svg:width="8.381cm" svg:height="2.539cm" svg:x="12.878cm" svg:y="13.64cm">
          <text:p text:style-name="P25"><text:span text:style-name="T46">TanStack Query</text:span></text:p>
          <text:p text:style-name="P25"><text:span text:style-name="T34">Cache e estado assíncron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0" draw:style-name="gr17" draw:text-style-name="P14" draw:layer="layout" svg:width="9.905cm" svg:height="3.428cm" svg:x="22.2cm" svg:y="13.081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31" draw:style-name="gr2" draw:text-style-name="P3" draw:layer="layout" svg:width="0.355cm" svg:height="3.428cm" svg:x="22.2cm" svg:y="13.081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32" draw:style-name="gr120" draw:text-style-name="P26" draw:layer="layout" svg:width="8.381cm" svg:height="2.539cm" svg:x="23.216cm" svg:y="13.64cm">
          <text:p text:style-name="P25"><text:span text:style-name="T46">Tailwind CSS</text:span></text:p>
          <text:p text:style-name="P25"><text:span text:style-name="T34">Estilização utilitár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Rectangle 1" draw:style-name="gr14" draw:text-style-name="P13" draw:layer="layout" svg:width="33.865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1" draw:text-style-name="P31" draw:layer="layout" svg:width="0.558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21" draw:text-style-name="P5" draw:layer="layout" svg:width="21.589cm" svg:height="1.015cm" svg:x="1.524cm" svg:y="1.143cm">
          <text:p text:style-name="P4"><text:span text:style-name="T45">BLOCO 03 · ENGENHAR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2" draw:text-style-name="P5" draw:layer="layout" svg:width="23.367cm" svg:height="2.539cm" svg:x="1.473cm" svg:y="2.032cm">
          <text:p text:style-name="P4"><text:span text:style-name="T20">Arquitetura em camadas (MVC adaptad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23" draw:text-style-name="P21" draw:layer="layout" svg:width="6.857cm" svg:height="1.066cm" svg:x="25.738cm" svg:y="1.067cm">
          <text:p text:style-name="P1"><text:span text:style-name="T36">Apresenta: Cesario Junior</text:span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6" draw:style-name="gr17" draw:text-style-name="P14" draw:layer="layout" svg:width="29.209cm" svg:height="2.488cm" svg:x="2.286cm" svg:y="5.0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7" draw:style-name="gr51" draw:text-style-name="P31" draw:layer="layout" svg:width="0.405cm" svg:height="2.488cm" svg:x="2.286cm" svg:y="5.0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8" draw:style-name="gr124" draw:text-style-name="P17" draw:layer="layout" svg:width="27.939cm" svg:height="2.031cm" svg:x="3.302cm" svg:y="5.436cm">
          <text:p text:style-name="P16"><text:span text:style-name="T46">VIEW — Apresentação</text:span></text:p>
          <text:p text:style-name="P16"><text:span text:style-name="T34">pages/*.tsx · React + Hook Form + Zod + TanStack Query + Tailwi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9" draw:style-name="gr125" draw:text-style-name="P39" draw:layer="layout" svg:width="0.761cm" svg:height="0.558cm" svg:x="16.51cm" svg:y="7.62cm">
          <text:p text:style-name="P1"><text:span text:style-name="T1"/></text:p>
          <draw:enhanced-geometry draw:mirror-horizontal="false" draw:mirror-vertical="false" draw:glue-points="?f7 0 0 ?f5 ?f7 ?f13 ?f14 ?f5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position-x="?f8" draw:handle-position-y="0" draw:handle-range-x-maximum="100000" draw:handle-range-x-minimum="0"/>
            <draw:handle draw:handle-position="0 ?f5" draw:handle-position-x="0" draw:handle-position-y="?f5" draw:handle-range-y-maximum="?f1" draw:handle-range-y-minimum="0"/>
          </draw:enhanced-geometry>
        </draw:custom-shape>
        <draw:custom-shape draw:name="Rounded Rectangle 10" draw:style-name="gr17" draw:text-style-name="P14" draw:layer="layout" svg:width="29.209cm" svg:height="2.488cm" svg:x="2.286cm" svg:y="8.255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1" draw:style-name="gr5" draw:text-style-name="P8" draw:layer="layout" svg:width="0.405cm" svg:height="2.488cm" svg:x="2.286cm" svg:y="8.255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2" draw:style-name="gr126" draw:text-style-name="P17" draw:layer="layout" svg:width="27.939cm" svg:height="2.031cm" svg:x="3.302cm" svg:y="8.611cm">
          <text:p text:style-name="P16"><text:span text:style-name="T46">CONTROLLER — API Routes</text:span></text:p>
          <text:p text:style-name="P16"><text:span text:style-name="T34">pages/api/*.ts · sessão, autorização por role, validação Zod, auditor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3" draw:style-name="gr125" draw:text-style-name="P39" draw:layer="layout" svg:width="0.761cm" svg:height="0.558cm" svg:x="16.51cm" svg:y="10.795cm">
          <text:p text:style-name="P1"><text:span text:style-name="T1"/></text:p>
          <draw:enhanced-geometry draw:mirror-horizontal="false" draw:mirror-vertical="false" draw:glue-points="?f7 0 0 ?f5 ?f7 ?f13 ?f14 ?f5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position-x="?f8" draw:handle-position-y="0" draw:handle-range-x-maximum="100000" draw:handle-range-x-minimum="0"/>
            <draw:handle draw:handle-position="0 ?f5" draw:handle-position-x="0" draw:handle-position-y="?f5" draw:handle-range-y-maximum="?f1" draw:handle-range-y-minimum="0"/>
          </draw:enhanced-geometry>
        </draw:custom-shape>
        <draw:custom-shape draw:name="Rounded Rectangle 14" draw:style-name="gr17" draw:text-style-name="P14" draw:layer="layout" svg:width="29.209cm" svg:height="2.488cm" svg:x="2.286cm" svg:y="11.43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5" draw:style-name="gr2" draw:text-style-name="P3" draw:layer="layout" svg:width="0.405cm" svg:height="2.488cm" svg:x="2.286cm" svg:y="11.43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6" draw:style-name="gr127" draw:text-style-name="P17" draw:layer="layout" svg:width="27.939cm" svg:height="2.031cm" svg:x="3.302cm" svg:y="11.786cm">
          <text:p text:style-name="P16"><text:span text:style-name="T46">SERVICE — lib/</text:span></text:p>
          <text:p text:style-name="P16"><text:span text:style-name="T34">prisma.ts (singleton) · logging.ts (audit log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7" draw:style-name="gr125" draw:text-style-name="P39" draw:layer="layout" svg:width="0.761cm" svg:height="0.558cm" svg:x="16.51cm" svg:y="13.97cm">
          <text:p text:style-name="P1"><text:span text:style-name="T1"/></text:p>
          <draw:enhanced-geometry draw:mirror-horizontal="false" draw:mirror-vertical="false" draw:glue-points="?f7 0 0 ?f5 ?f7 ?f13 ?f14 ?f5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position-x="?f8" draw:handle-position-y="0" draw:handle-range-x-maximum="100000" draw:handle-range-x-minimum="0"/>
            <draw:handle draw:handle-position="0 ?f5" draw:handle-position-x="0" draw:handle-position-y="?f5" draw:handle-range-y-maximum="?f1" draw:handle-range-y-minimum="0"/>
          </draw:enhanced-geometry>
        </draw:custom-shape>
        <draw:custom-shape draw:name="Rounded Rectangle 18" draw:style-name="gr17" draw:text-style-name="P14" draw:layer="layout" svg:width="29.209cm" svg:height="2.488cm" svg:x="2.286cm" svg:y="14.605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9" draw:style-name="gr104" draw:text-style-name="P38" draw:layer="layout" svg:width="0.405cm" svg:height="2.488cm" svg:x="2.286cm" svg:y="14.605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0" draw:style-name="gr128" draw:text-style-name="P17" draw:layer="layout" svg:width="27.939cm" svg:height="2.031cm" svg:x="3.302cm" svg:y="14.961cm">
          <text:p text:style-name="P16"><text:span text:style-name="T46">MODEL — Prisma + PostgreSQL</text:span></text:p>
          <text:p text:style-name="P16"><text:span text:style-name="T34">schema.prisma · transações atômicas · migrações versionad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draw:custom-shape draw:name="Rectangle 1" draw:style-name="gr14" draw:text-style-name="P13" draw:layer="layout" svg:width="33.865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1" draw:text-style-name="P31" draw:layer="layout" svg:width="0.558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29" draw:text-style-name="P5" draw:layer="layout" svg:width="21.589cm" svg:height="1.015cm" svg:x="1.524cm" svg:y="1.143cm">
          <text:p text:style-name="P4"><text:span text:style-name="T45">BLOCO 03 · ENGENHAR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0" draw:text-style-name="P5" draw:layer="layout" svg:width="23.367cm" svg:height="2.539cm" svg:x="1.473cm" svg:y="2.032cm">
          <text:p text:style-name="P4"><text:span text:style-name="T20">Ciclo de uma requisição &amp; Seguranç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31" draw:text-style-name="P21" draw:layer="layout" svg:width="6.857cm" svg:height="1.066cm" svg:x="25.738cm" svg:y="1.067cm">
          <text:p text:style-name="P1"><text:span text:style-name="T36">Apresenta: Cesario Junior</text:span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6" draw:style-name="gr17" draw:text-style-name="P14" draw:layer="layout" svg:width="16.255cm" svg:height="11.937cm" svg:x="1.524cm" svg:y="5.0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7" draw:style-name="gr132" draw:text-style-name="P5" draw:layer="layout" svg:width="14.731cm" svg:height="1.269cm" svg:x="2.286cm" svg:y="5.461cm">
          <text:p text:style-name="P4"><text:span text:style-name="T33">Baixa de estoque autenticad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3" draw:text-style-name="P41" draw:layer="layout" svg:width="14.731cm" svg:height="9.651cm" svg:x="2.413cm" svg:y="6.858cm">
          <text:p text:style-name="P40"><text:span text:style-name="T35">1. <text:s/></text:span><text:span text:style-name="T38">UI valida os dados com Zod (cliente)</text:span></text:p>
          <text:p text:style-name="P40"><text:span text:style-name="T35">2. <text:s/></text:span><text:span text:style-name="T38">TanStack Query envia POST /api/estoque/baixar</text:span></text:p>
          <text:p text:style-name="P40"><text:span text:style-name="T35">3. <text:s/></text:span><text:span text:style-name="T38">API verifica a sessão (401 se ausente)</text:span></text:p>
          <text:p text:style-name="P40"><text:span text:style-name="T35">4. <text:s/></text:span><text:span text:style-name="T38">Verifica o role do usuário (403 se sem permissão)</text:span></text:p>
          <text:p text:style-name="P40"><text:span text:style-name="T35">5. <text:s/></text:span><text:span text:style-name="T38">Valida o payload com Zod (400 se inválido)</text:span></text:p>
          <text:p text:style-name="P40"><text:span text:style-name="T35">6. <text:s/></text:span><text:span text:style-name="T38">Transação Prisma: saldo + movimentação + log</text:span></text:p>
          <text:p text:style-name="P40"><text:span text:style-name="T35">7. <text:s/></text:span><text:span text:style-name="T38">Retorna 200 e a UI revalida o cach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1" draw:text-style-name="P2" draw:layer="layout" svg:width="13.969cm" svg:height="11.937cm" svg:x="18.288cm" svg:y="5.0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0" draw:style-name="gr134" draw:text-style-name="P5" draw:layer="layout" svg:width="12.699cm" svg:height="1.269cm" svg:x="19.05cm" svg:y="5.461cm">
          <text:p text:style-name="P4"><text:span text:style-name="T47">🔒 <text:s/>Seguranç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35" draw:text-style-name="P5" draw:layer="layout" svg:width="12.445cm" svg:height="1.777cm" svg:x="19.177cm" svg:y="6.985cm">
          <text:p text:style-name="P4"><text:span text:style-name="T48">• Senhas <text:s/>— <text:s/></text:span><text:span text:style-name="T49">hash bcrypt — nunca em texto pur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36" draw:text-style-name="P5" draw:layer="layout" svg:width="12.445cm" svg:height="1.777cm" svg:x="19.177cm" svg:y="8.585cm">
          <text:p text:style-name="P4"><text:span text:style-name="T48">• Autorização <text:s/>— <text:s/></text:span><text:span text:style-name="T49">verificada server-side em cada endpoi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37" draw:text-style-name="P5" draw:layer="layout" svg:width="12.445cm" svg:height="1.777cm" svg:x="19.177cm" svg:y="10.185cm">
          <text:p text:style-name="P4"><text:span text:style-name="T48">• Validação <text:s/>— <text:s/></text:span><text:span text:style-name="T49">toda entrada passa por Zod antes do banc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38" draw:text-style-name="P5" draw:layer="layout" svg:width="12.445cm" svg:height="1.777cm" svg:x="19.177cm" svg:y="11.786cm">
          <text:p text:style-name="P4"><text:span text:style-name="T48">• Sessão <text:s/>— <text:s/></text:span><text:span text:style-name="T49">token JWT assinado com NEXTAUTH_SECR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39" draw:text-style-name="P5" draw:layer="layout" svg:width="12.445cm" svg:height="1.777cm" svg:x="19.177cm" svg:y="13.386cm">
          <text:p text:style-name="P4"><text:span text:style-name="T48">• SQL Injection <text:s/>— <text:s/></text:span><text:span text:style-name="T49">mitigado pelo Prisma (queries parametrizada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40" draw:text-style-name="P5" draw:layer="layout" svg:width="12.445cm" svg:height="1.777cm" svg:x="19.177cm" svg:y="14.986cm">
          <text:p text:style-name="P4"><text:span text:style-name="T48">• Auditoria <text:s/>— <text:s/></text:span><text:span text:style-name="T49">toda ação relevante gera um Lo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draw:custom-shape draw:name="Rectangle 1" draw:style-name="gr14" draw:text-style-name="P13" draw:layer="layout" svg:width="33.865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4" draw:text-style-name="P38" draw:layer="layout" svg:width="0.558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41" draw:text-style-name="P5" draw:layer="layout" svg:width="21.589cm" svg:height="1.015cm" svg:x="1.524cm" svg:y="1.143cm">
          <text:p text:style-name="P4"><text:span text:style-name="T50">BLOCO 04 · DAD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2" draw:text-style-name="P5" draw:layer="layout" svg:width="23.367cm" svg:height="2.539cm" svg:x="1.473cm" svg:y="2.032cm">
          <text:p text:style-name="P4"><text:span text:style-name="T20">Modelagem do Banc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3" draw:text-style-name="P22" draw:layer="layout" svg:width="6.857cm" svg:height="1.066cm" svg:x="25.738cm" svg:y="1.067cm">
          <text:p text:style-name="P1"><text:span text:style-name="T36">Apresenta: Yuri Carvalho</text:span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6" draw:style-name="gr17" draw:text-style-name="P14" draw:layer="layout" svg:width="15.112cm" svg:height="2.793cm" svg:x="1.524cm" svg:y="5.0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7" draw:style-name="gr5" draw:text-style-name="P8" draw:layer="layout" svg:width="0.355cm" svg:height="2.793cm" svg:x="1.524cm" svg:y="5.0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8" draw:style-name="gr144" draw:text-style-name="P17" draw:layer="layout" svg:width="13.715cm" svg:height="2.285cm" svg:x="2.54cm" svg:y="5.537cm">
          <text:p text:style-name="P16"><text:span text:style-name="T33">Usuario</text:span></text:p>
          <text:p text:style-name="P16"><text:span text:style-name="T34">Quem opera o sistema · role de acesso · CU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17" draw:text-style-name="P14" draw:layer="layout" svg:width="15.112cm" svg:height="2.793cm" svg:x="17.145cm" svg:y="5.0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0" draw:style-name="gr2" draw:text-style-name="P3" draw:layer="layout" svg:width="0.355cm" svg:height="2.793cm" svg:x="17.145cm" svg:y="5.0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1" draw:style-name="gr145" draw:text-style-name="P17" draw:layer="layout" svg:width="13.715cm" svg:height="2.285cm" svg:x="18.161cm" svg:y="5.537cm">
          <text:p text:style-name="P16"><text:span text:style-name="T33">Produto</text:span></text:p>
          <text:p text:style-name="P16"><text:span text:style-name="T34">Item de estoque · quantidade é a fonte de verdad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17" draw:text-style-name="P14" draw:layer="layout" svg:width="15.112cm" svg:height="2.793cm" svg:x="1.524cm" svg:y="8.382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3" draw:style-name="gr51" draw:text-style-name="P31" draw:layer="layout" svg:width="0.355cm" svg:height="2.793cm" svg:x="1.524cm" svg:y="8.382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4" draw:style-name="gr146" draw:text-style-name="P17" draw:layer="layout" svg:width="13.715cm" svg:height="2.285cm" svg:x="2.54cm" svg:y="8.839cm">
          <text:p text:style-name="P16"><text:span text:style-name="T33">MovimentacaoEstoque</text:span></text:p>
          <text:p text:style-name="P16"><text:span text:style-name="T34">Ledger imutável · cada entrada/saída/ajus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5" draw:style-name="gr17" draw:text-style-name="P14" draw:layer="layout" svg:width="15.112cm" svg:height="2.793cm" svg:x="17.145cm" svg:y="8.382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6" draw:style-name="gr104" draw:text-style-name="P38" draw:layer="layout" svg:width="0.355cm" svg:height="2.793cm" svg:x="17.145cm" svg:y="8.382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7" draw:style-name="gr147" draw:text-style-name="P17" draw:layer="layout" svg:width="13.715cm" svg:height="2.285cm" svg:x="18.161cm" svg:y="8.839cm">
          <text:p text:style-name="P16"><text:span text:style-name="T33">Log</text:span></text:p>
          <text:p text:style-name="P16"><text:span text:style-name="T34">Auditoria de toda ação relevante (JSON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1" draw:text-style-name="P2" draw:layer="layout" svg:width="30.733cm" svg:height="5.079cm" svg:x="1.524cm" svg:y="12.065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9" draw:style-name="gr148" draw:text-style-name="P5" draw:layer="layout" svg:width="27.939cm" svg:height="1.269cm" svg:x="2.286cm" svg:y="12.446cm">
          <text:p text:style-name="P4"><text:span text:style-name="T51">Enums do domín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49" draw:text-style-name="P35" draw:layer="layout" svg:width="14.477cm" svg:height="3.047cm" svg:x="2.413cm" svg:y="13.843cm">
          <text:p text:style-name="P34"><text:span text:style-name="T52">UsuarioRole</text:span></text:p>
          <text:p text:style-name="P34"><text:span text:style-name="T53">ADMIN · GERENTE · OPERADOR · USUAR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50" draw:text-style-name="P37" draw:layer="layout" svg:width="14.477cm" svg:height="3.047cm" svg:x="17.272cm" svg:y="13.843cm">
          <text:p text:style-name="P36"><text:span text:style-name="T52">TipoMovimento</text:span></text:p>
          <text:p text:style-name="P36"><text:span text:style-name="T53">ESTOQUE_INICIAL · COMPRA_ENTRADA · VENDA_SAIDA · AJUSTE_ESTOQUE · PERDA_ESTOQU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draw:custom-shape draw:name="Rectangle 1" draw:style-name="gr14" draw:text-style-name="P13" draw:layer="layout" svg:width="33.865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4" draw:text-style-name="P38" draw:layer="layout" svg:width="0.558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51" draw:text-style-name="P5" draw:layer="layout" svg:width="21.589cm" svg:height="1.015cm" svg:x="1.524cm" svg:y="1.143cm">
          <text:p text:style-name="P4"><text:span text:style-name="T50">BLOCO 04 · DAD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2" draw:text-style-name="P5" draw:layer="layout" svg:width="23.367cm" svg:height="2.539cm" svg:x="1.473cm" svg:y="2.032cm">
          <text:p text:style-name="P4"><text:span text:style-name="T20">Regras de negócio no banc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53" draw:text-style-name="P22" draw:layer="layout" svg:width="6.857cm" svg:height="1.066cm" svg:x="25.738cm" svg:y="1.067cm">
          <text:p text:style-name="P1"><text:span text:style-name="T36">Apresenta: Yuri Carvalho</text:span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6" draw:style-name="gr17" draw:text-style-name="P14" draw:layer="layout" svg:width="30.733cm" svg:height="2.234cm" svg:x="1.524cm" svg:y="5.0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7" draw:style-name="gr154" draw:text-style-name="P5" draw:layer="layout" svg:width="2.031cm" svg:height="1.523cm" svg:x="2.159cm" svg:y="5.537cm">
          <text:p text:style-name="P4"><text:span text:style-name="T54">🔒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55" draw:text-style-name="P5" draw:layer="layout" svg:width="27.431cm" svg:height="1.777cm" svg:x="4.191cm" svg:y="5.385cm">
          <text:p text:style-name="P4"><text:span text:style-name="T55">Atomicidade <text:s/>— <text:s/></text:span><text:span text:style-name="T13">Produto + Movimentação + Log sempre em uma única transação Prisma — o saldo nunca rach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17" draw:text-style-name="P14" draw:layer="layout" svg:width="30.733cm" svg:height="2.234cm" svg:x="1.524cm" svg:y="7.569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0" draw:style-name="gr156" draw:text-style-name="P5" draw:layer="layout" svg:width="2.031cm" svg:height="1.523cm" svg:x="2.159cm" svg:y="8.026cm">
          <text:p text:style-name="P4"><text:span text:style-name="T54">📖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57" draw:text-style-name="P5" draw:layer="layout" svg:width="27.431cm" svg:height="1.777cm" svg:x="4.191cm" svg:y="7.874cm">
          <text:p text:style-name="P4"><text:span text:style-name="T55">Saldo é fonte de verdade <text:s/>— <text:s/></text:span><text:span text:style-name="T13">Produto.quantidade reflete o estoque atual; as movimentações são o histórico auditáve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17" draw:text-style-name="P14" draw:layer="layout" svg:width="30.733cm" svg:height="2.234cm" svg:x="1.524cm" svg:y="10.05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3" draw:style-name="gr158" draw:text-style-name="P5" draw:layer="layout" svg:width="2.031cm" svg:height="1.523cm" svg:x="2.159cm" svg:y="10.516cm">
          <text:p text:style-name="P4"><text:span text:style-name="T54">🔗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59" draw:text-style-name="P5" draw:layer="layout" svg:width="27.431cm" svg:height="1.777cm" svg:x="4.191cm" svg:y="10.363cm">
          <text:p text:style-name="P4"><text:span text:style-name="T55">Integridade referencial <text:s/>— <text:s/></text:span><text:span text:style-name="T13">Excluir um Produto cascateia para suas movimentações (onDelete: Cascade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5" draw:style-name="gr17" draw:text-style-name="P14" draw:layer="layout" svg:width="30.733cm" svg:height="2.234cm" svg:x="1.524cm" svg:y="12.54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6" draw:style-name="gr160" draw:text-style-name="P5" draw:layer="layout" svg:width="2.031cm" svg:height="1.523cm" svg:x="2.159cm" svg:y="13.005cm">
          <text:p text:style-name="P4"><text:span text:style-name="T54">👁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61" draw:text-style-name="P5" draw:layer="layout" svg:width="27.431cm" svg:height="1.777cm" svg:x="4.191cm" svg:y="12.852cm">
          <text:p text:style-name="P4"><text:span text:style-name="T55">Rastreabilidade <text:s/>— <text:s/></text:span><text:span text:style-name="T13">Toda movimentação referencia obrigatoriamente o usuário responsáve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17" draw:text-style-name="P14" draw:layer="layout" svg:width="30.733cm" svg:height="2.234cm" svg:x="1.524cm" svg:y="15.03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9" draw:style-name="gr162" draw:text-style-name="P5" draw:layer="layout" svg:width="2.031cm" svg:height="1.523cm" svg:x="2.159cm" svg:y="15.494cm">
          <text:p text:style-name="P4"><text:span text:style-name="T54">🔑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63" draw:text-style-name="P5" draw:layer="layout" svg:width="27.431cm" svg:height="1.777cm" svg:x="4.191cm" svg:y="15.342cm">
          <text:p text:style-name="P4"><text:span text:style-name="T55">Senha protegida <text:s/>— <text:s/></text:span><text:span text:style-name="T13">Usuario.password guarda apenas hash bcrypt — jamais texto puro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draw:custom-shape draw:name="Rectangle 1" draw:style-name="gr14" draw:text-style-name="P13" draw:layer="layout" svg:width="33.865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4" draw:text-style-name="P38" draw:layer="layout" svg:width="0.558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64" draw:text-style-name="P5" draw:layer="layout" svg:width="21.589cm" svg:height="1.015cm" svg:x="1.524cm" svg:y="1.143cm">
          <text:p text:style-name="P4"><text:span text:style-name="T50">BLOCO 04 · DAD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5" draw:text-style-name="P5" draw:layer="layout" svg:width="23.367cm" svg:height="2.539cm" svg:x="1.473cm" svg:y="2.032cm">
          <text:p text:style-name="P4"><text:span text:style-name="T20">API REST &amp; Permissõ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66" draw:text-style-name="P22" draw:layer="layout" svg:width="6.857cm" svg:height="1.066cm" svg:x="25.738cm" svg:y="1.067cm">
          <text:p text:style-name="P1"><text:span text:style-name="T36">Apresenta: Yuri Carvalho</text:span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6" draw:style-name="gr167" draw:text-style-name="P5" draw:layer="layout" svg:width="30.479cm" svg:height="1.269cm" svg:x="1.524cm" svg:y="4.826cm">
          <text:p text:style-name="P4"><text:span text:style-name="T56">Endpoints Next.js API Routes — REST, autenticados por JW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17" draw:text-style-name="P14" draw:layer="layout" svg:width="15.112cm" svg:height="1.269cm" svg:x="1.524cm" svg:y="6.096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8" draw:style-name="gr168" draw:text-style-name="P5" draw:layer="layout" svg:width="14.223cm" svg:height="1.015cm" svg:x="2.159cm" svg:y="6.248cm">
          <text:p text:style-name="P4"><text:span text:style-name="T39">GET <text:s/>/api/produ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17" draw:text-style-name="P14" draw:layer="layout" svg:width="15.112cm" svg:height="1.269cm" svg:x="17.145cm" svg:y="6.096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0" draw:style-name="gr169" draw:text-style-name="P5" draw:layer="layout" svg:width="14.223cm" svg:height="1.015cm" svg:x="17.78cm" svg:y="6.248cm">
          <text:p text:style-name="P4"><text:span text:style-name="T39">POST /api/produ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17" draw:text-style-name="P14" draw:layer="layout" svg:width="15.112cm" svg:height="1.269cm" svg:x="1.524cm" svg:y="7.671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2" draw:style-name="gr170" draw:text-style-name="P5" draw:layer="layout" svg:width="14.223cm" svg:height="1.015cm" svg:x="2.159cm" svg:y="7.823cm">
          <text:p text:style-name="P4"><text:span text:style-name="T39">GET <text:s/>/api/produtos/[id]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17" draw:text-style-name="P14" draw:layer="layout" svg:width="15.112cm" svg:height="1.269cm" svg:x="17.145cm" svg:y="7.671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4" draw:style-name="gr171" draw:text-style-name="P5" draw:layer="layout" svg:width="14.223cm" svg:height="1.015cm" svg:x="17.78cm" svg:y="7.823cm">
          <text:p text:style-name="P4"><text:span text:style-name="T39">PUT <text:s/>/api/produtos/[id]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5" draw:style-name="gr17" draw:text-style-name="P14" draw:layer="layout" svg:width="15.112cm" svg:height="1.269cm" svg:x="1.524cm" svg:y="9.246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6" draw:style-name="gr172" draw:text-style-name="P5" draw:layer="layout" svg:width="14.223cm" svg:height="1.015cm" svg:x="2.159cm" svg:y="9.398cm">
          <text:p text:style-name="P4"><text:span text:style-name="T39">DELETE /api/produtos/[id]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7" draw:style-name="gr17" draw:text-style-name="P14" draw:layer="layout" svg:width="15.112cm" svg:height="1.269cm" svg:x="17.145cm" svg:y="9.246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8" draw:style-name="gr173" draw:text-style-name="P5" draw:layer="layout" svg:width="14.223cm" svg:height="1.015cm" svg:x="17.78cm" svg:y="9.398cm">
          <text:p text:style-name="P4"><text:span text:style-name="T39">POST /api/estoque/baixa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9" draw:style-name="gr1" draw:text-style-name="P2" draw:layer="layout" svg:width="30.733cm" svg:height="5.587cm" svg:x="1.524cm" svg:y="11.55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0" draw:style-name="gr174" draw:text-style-name="P5" draw:layer="layout" svg:width="27.939cm" svg:height="1.269cm" svg:x="2.286cm" svg:y="11.887cm">
          <text:p text:style-name="P4"><text:span text:style-name="T51">Matriz de permissões por ro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75" draw:text-style-name="P5" draw:layer="layout" svg:width="10.921cm" svg:height="1.015cm" svg:x="2.413cm" svg:y="13.208cm">
          <text:p text:style-name="P4"><text:span text:style-name="T48">Consultar produ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76" draw:text-style-name="P5" draw:layer="layout" svg:width="18.287cm" svg:height="1.015cm" svg:x="13.462cm" svg:y="13.208cm">
          <text:p text:style-name="P4"><text:span text:style-name="T57">USUARIO · OPERADOR · GERENTE · ADM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77" draw:text-style-name="P5" draw:layer="layout" svg:width="10.921cm" svg:height="1.015cm" svg:x="2.413cm" svg:y="14.173cm">
          <text:p text:style-name="P4"><text:span text:style-name="T48">Baixar estoqu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78" draw:text-style-name="P5" draw:layer="layout" svg:width="18.287cm" svg:height="1.015cm" svg:x="13.462cm" svg:y="14.173cm">
          <text:p text:style-name="P4"><text:span text:style-name="T57">OPERADOR · GERENTE · ADM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79" draw:text-style-name="P5" draw:layer="layout" svg:width="10.921cm" svg:height="1.015cm" svg:x="2.413cm" svg:y="15.138cm">
          <text:p text:style-name="P4"><text:span text:style-name="T48">Criar / editar produ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80" draw:text-style-name="P5" draw:layer="layout" svg:width="18.287cm" svg:height="1.015cm" svg:x="13.462cm" svg:y="15.138cm">
          <text:p text:style-name="P4"><text:span text:style-name="T57">GERENTE · ADM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81" draw:text-style-name="P5" draw:layer="layout" svg:width="10.921cm" svg:height="1.015cm" svg:x="2.413cm" svg:y="16.104cm">
          <text:p text:style-name="P4"><text:span text:style-name="T48">Excluir produ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82" draw:text-style-name="P5" draw:layer="layout" svg:width="18.287cm" svg:height="1.015cm" svg:x="13.462cm" svg:y="16.104cm">
          <text:p text:style-name="P4"><text:span text:style-name="T57">ADM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draw:custom-shape draw:name="Rectangle 1" draw:style-name="gr14" draw:text-style-name="P13" draw:layer="layout" svg:width="33.865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4" draw:text-style-name="P38" draw:layer="layout" svg:width="0.558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83" draw:text-style-name="P5" draw:layer="layout" svg:width="21.589cm" svg:height="1.015cm" svg:x="1.524cm" svg:y="1.143cm">
          <text:p text:style-name="P4"><text:span text:style-name="T50">BLOCO 04 · MÉTO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84" draw:text-style-name="P5" draw:layer="layout" svg:width="23.367cm" svg:height="2.539cm" svg:x="1.473cm" svg:y="2.032cm">
          <text:p text:style-name="P4"><text:span text:style-name="T20">Como construímos: PRD → Spec → Códig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85" draw:text-style-name="P22" draw:layer="layout" svg:width="6.857cm" svg:height="1.066cm" svg:x="25.738cm" svg:y="1.067cm">
          <text:p text:style-name="P1"><text:span text:style-name="T36">Apresenta: Yuri Carvalho</text:span></text:p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6" draw:style-name="gr17" draw:text-style-name="P14" draw:layer="layout" svg:width="5.841cm" svg:height="6.095cm" svg:x="1.524cm" svg:y="5.842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7" draw:style-name="gr186" draw:text-style-name="P15" draw:layer="layout" svg:width="2.031cm" svg:height="2.031cm" svg:x="3.429cm" svg:y="6.604cm">
          <text:p text:style-name="P1"><text:span text:style-name="T58">1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187" draw:text-style-name="P28" draw:layer="layout" svg:width="5.333cm" svg:height="1.269cm" svg:x="1.778cm" svg:y="9.144cm">
          <text:p text:style-name="P27"><text:span text:style-name="T55">PR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88" draw:text-style-name="P43" draw:layer="layout" svg:width="5.079cm" svg:height="1.523cm" svg:x="1.905cm" svg:y="10.287cm">
          <text:p text:style-name="P42"><text:span text:style-name="T59">Problema, público, funcionalidades e flux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0" draw:style-name="gr5" draw:text-style-name="P8" draw:layer="layout" svg:width="0.634cm" svg:height="0.761cm" svg:x="7.315cm" svg:y="8.382cm">
          <text:p text:style-name="P1"><text:span text:style-name="T1"/></text:p>
          <draw:enhanced-geometry draw:mirror-horizontal="false" draw:mirror-vertical="false" draw:glue-points="?f5 0 0 ?f7 ?f5 ?f13 ?f14 ?f7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Rounded Rectangle 11" draw:style-name="gr17" draw:text-style-name="P14" draw:layer="layout" svg:width="5.841cm" svg:height="6.095cm" svg:x="7.747cm" svg:y="5.842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2" draw:style-name="gr189" draw:text-style-name="P15" draw:layer="layout" svg:width="2.031cm" svg:height="2.031cm" svg:x="9.652cm" svg:y="6.604cm">
          <text:p text:style-name="P1"><text:span text:style-name="T58">2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3" draw:style-name="gr190" draw:text-style-name="P28" draw:layer="layout" svg:width="5.333cm" svg:height="1.269cm" svg:x="8.001cm" svg:y="9.144cm">
          <text:p text:style-name="P27"><text:span text:style-name="T55">Spe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91" draw:text-style-name="P43" draw:layer="layout" svg:width="5.079cm" svg:height="1.523cm" svg:x="8.128cm" svg:y="10.287cm">
          <text:p text:style-name="P42"><text:span text:style-name="T59">Requisitos detalhados a partir do PR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5" draw:style-name="gr5" draw:text-style-name="P8" draw:layer="layout" svg:width="0.634cm" svg:height="0.761cm" svg:x="13.538cm" svg:y="8.382cm">
          <text:p text:style-name="P1"><text:span text:style-name="T1"/></text:p>
          <draw:enhanced-geometry draw:mirror-horizontal="false" draw:mirror-vertical="false" draw:glue-points="?f5 0 0 ?f7 ?f5 ?f13 ?f14 ?f7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Rounded Rectangle 16" draw:style-name="gr17" draw:text-style-name="P14" draw:layer="layout" svg:width="5.841cm" svg:height="6.095cm" svg:x="13.97cm" svg:y="5.842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7" draw:style-name="gr192" draw:text-style-name="P15" draw:layer="layout" svg:width="2.031cm" svg:height="2.031cm" svg:x="15.875cm" svg:y="6.604cm">
          <text:p text:style-name="P1"><text:span text:style-name="T58">3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8" draw:style-name="gr193" draw:text-style-name="P28" draw:layer="layout" svg:width="5.333cm" svg:height="1.269cm" svg:x="14.224cm" svg:y="9.144cm">
          <text:p text:style-name="P27"><text:span text:style-name="T55">Plan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94" draw:text-style-name="P43" draw:layer="layout" svg:width="5.079cm" svg:height="1.523cm" svg:x="14.351cm" svg:y="10.287cm">
          <text:p text:style-name="P42"><text:span text:style-name="T59">Stack e arquitetura registradas em decisõ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0" draw:style-name="gr5" draw:text-style-name="P8" draw:layer="layout" svg:width="0.634cm" svg:height="0.761cm" svg:x="19.761cm" svg:y="8.382cm">
          <text:p text:style-name="P1"><text:span text:style-name="T1"/></text:p>
          <draw:enhanced-geometry draw:mirror-horizontal="false" draw:mirror-vertical="false" draw:glue-points="?f5 0 0 ?f7 ?f5 ?f13 ?f14 ?f7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Rounded Rectangle 21" draw:style-name="gr17" draw:text-style-name="P14" draw:layer="layout" svg:width="5.841cm" svg:height="6.095cm" svg:x="20.193cm" svg:y="5.842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22" draw:style-name="gr195" draw:text-style-name="P15" draw:layer="layout" svg:width="2.031cm" svg:height="2.031cm" svg:x="22.098cm" svg:y="6.604cm">
          <text:p text:style-name="P1"><text:span text:style-name="T58">4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3" draw:style-name="gr196" draw:text-style-name="P28" draw:layer="layout" svg:width="5.333cm" svg:height="1.269cm" svg:x="20.447cm" svg:y="9.144cm">
          <text:p text:style-name="P27"><text:span text:style-name="T55">Implementa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97" draw:text-style-name="P43" draw:layer="layout" svg:width="5.079cm" svg:height="1.523cm" svg:x="20.574cm" svg:y="10.287cm">
          <text:p text:style-name="P42"><text:span text:style-name="T59">Construção em módulos por featu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5" draw:style-name="gr5" draw:text-style-name="P8" draw:layer="layout" svg:width="0.634cm" svg:height="0.761cm" svg:x="25.984cm" svg:y="8.382cm">
          <text:p text:style-name="P1"><text:span text:style-name="T1"/></text:p>
          <draw:enhanced-geometry draw:mirror-horizontal="false" draw:mirror-vertical="false" draw:glue-points="?f5 0 0 ?f7 ?f5 ?f13 ?f14 ?f7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Rounded Rectangle 26" draw:style-name="gr17" draw:text-style-name="P14" draw:layer="layout" svg:width="5.841cm" svg:height="6.095cm" svg:x="26.416cm" svg:y="5.842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27" draw:style-name="gr198" draw:text-style-name="P15" draw:layer="layout" svg:width="2.031cm" svg:height="2.031cm" svg:x="28.321cm" svg:y="6.604cm">
          <text:p text:style-name="P1"><text:span text:style-name="T58">5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8" draw:style-name="gr199" draw:text-style-name="P28" draw:layer="layout" svg:width="5.333cm" svg:height="1.269cm" svg:x="26.67cm" svg:y="9.144cm">
          <text:p text:style-name="P27"><text:span text:style-name="T55">Valida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00" draw:text-style-name="P43" draw:layer="layout" svg:width="5.079cm" svg:height="1.523cm" svg:x="26.797cm" svg:y="10.287cm">
          <text:p text:style-name="P42"><text:span text:style-name="T59">Verificação da qualidade entregu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01" draw:text-style-name="P45" draw:layer="layout" svg:width="30.479cm" svg:height="3.555cm" svg:x="1.524cm" svg:y="12.954cm">
          <text:p text:style-name="P44"><text:span text:style-name="T60">Cada funcionalidade nasce de uma </text:span><text:span text:style-name="T55">change versionada</text:span><text:span text:style-name="T60"> (propose → specs + design → tasks → apply → archive).</text:span></text:p>
          <text:p text:style-name="P44"><text:span text:style-name="T56">Zod é a fonte única de verdade dos dados e o mesmo schema valida no formulário e no servido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0.888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02" draw:text-style-name="P7" draw:layer="layout" svg:width="29.209cm" svg:height="3.809cm" svg:x="2.286cm" svg:y="4.064cm">
          <text:p text:style-name="P6"><text:span text:style-name="T61">Obrigado!</text:span></text:p>
          <text:p text:style-name="P6"><text:span text:style-name="T62">Sistema de Gestão de Armazém — controle de estoque em tempo re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" draw:text-style-name="P8" draw:layer="layout" svg:width="8.889cm" svg:height="0.105cm" svg:x="2.413cm" svg:y="8.8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03" draw:text-style-name="P5" draw:layer="layout" svg:width="27.939cm" svg:height="1.269cm" svg:x="2.286cm" svg:y="9.906cm">
          <text:p text:style-name="P4"><text:span text:style-name="T31">Perguntas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7" draw:text-style-name="P9" draw:layer="layout" svg:width="6.984cm" svg:height="2.285cm" svg:x="2.286cm" svg:y="12.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7" draw:style-name="gr204" draw:text-style-name="P28" draw:layer="layout" svg:width="6.984cm" svg:height="1.523cm" svg:x="2.286cm" svg:y="13.208cm">
          <text:p text:style-name="P27"><text:span text:style-name="T63">Samuel Maci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7" draw:text-style-name="P9" draw:layer="layout" svg:width="6.984cm" svg:height="2.285cm" svg:x="9.779cm" svg:y="12.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9" draw:style-name="gr205" draw:text-style-name="P28" draw:layer="layout" svg:width="6.984cm" svg:height="1.523cm" svg:x="9.779cm" svg:y="13.208cm">
          <text:p text:style-name="P27"><text:span text:style-name="T63">Daniel Dew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7" draw:text-style-name="P9" draw:layer="layout" svg:width="6.984cm" svg:height="2.285cm" svg:x="17.272cm" svg:y="12.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1" draw:style-name="gr206" draw:text-style-name="P28" draw:layer="layout" svg:width="6.984cm" svg:height="1.523cm" svg:x="17.272cm" svg:y="13.208cm">
          <text:p text:style-name="P27"><text:span text:style-name="T63">Cesario Juni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7" draw:text-style-name="P9" draw:layer="layout" svg:width="6.984cm" svg:height="2.285cm" svg:x="24.765cm" svg:y="12.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6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3" draw:style-name="gr207" draw:text-style-name="P28" draw:layer="layout" svg:width="6.984cm" svg:height="1.523cm" svg:x="24.765cm" svg:y="13.208cm">
          <text:p text:style-name="P27"><text:span text:style-name="T63">Yuri Carvalh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08" draw:text-style-name="P5" draw:layer="layout" svg:width="27.939cm" svg:height="1.015cm" svg:x="2.286cm" svg:y="16.256cm">
          <text:p text:style-name="P4"><text:span text:style-name="T13">github.com/AtomicWorm/sistemaWM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escription>generated using python-pptx</dc:description>
    <meta:editing-cycles>2</meta:editing-cycles>
    <meta:creation-date>2013-01-27T09:14:16</meta:creation-date>
    <dc:date>2026-06-29T19:21:16.628091300</dc:date>
    <meta:editing-duration>PT2M2S</meta:editing-duration>
    <meta:generator>LibreOffice/25.8.7.3$Windows_X86_64 LibreOffice_project/30742500f2d3eb4366ac312fa33d3dcabdb3eba5</meta:generator>
    <meta:document-statistic meta:object-count="502"/>
    <meta:user-defined meta:name="AppVersion">14.0000</meta:user-defined>
    <meta:user-defined meta:name="PresentationFormat">On-screen Show (4:3)</meta:user-defined>
  </office:meta>
</office:document-meta>
</file>